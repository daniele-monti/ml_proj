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Thumbnails/thumbnail.png" manifest:media-type="image/png"/>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fo:font-size="20pt" officeooo:rsid="00046c52" officeooo:paragraph-rsid="00046c52" style:font-size-asian="20pt" style:font-size-complex="20pt"/>
    </style:style>
    <style:style style:name="P2" style:family="paragraph" style:parent-style-name="Standard">
      <style:text-properties officeooo:rsid="00046c52" officeooo:paragraph-rsid="00046c52"/>
    </style:style>
    <style:style style:name="P3" style:family="paragraph" style:parent-style-name="Standard">
      <style:paragraph-properties fo:text-align="center" style:justify-single-word="false"/>
      <style:text-properties officeooo:rsid="00046c52" officeooo:paragraph-rsid="0008effe"/>
    </style:style>
    <style:style style:name="P4" style:family="paragraph" style:parent-style-name="Standard">
      <style:paragraph-properties fo:text-align="justify" style:justify-single-word="false"/>
      <style:text-properties officeooo:rsid="00046c52" officeooo:paragraph-rsid="00046c52"/>
    </style:style>
    <style:style style:name="P5" style:family="paragraph" style:parent-style-name="Standard">
      <style:paragraph-properties fo:text-align="justify" style:justify-single-word="false"/>
      <style:text-properties officeooo:paragraph-rsid="00085d6d"/>
    </style:style>
    <style:style style:name="P6" style:family="paragraph" style:parent-style-name="Standard">
      <style:paragraph-properties fo:text-align="justify" style:justify-single-word="false"/>
      <style:text-properties officeooo:paragraph-rsid="0008eff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a7a34"/>
    </style:style>
    <style:style style:name="P9" style:family="paragraph" style:parent-style-name="Standard">
      <style:paragraph-properties fo:text-align="justify" style:justify-single-word="false"/>
      <style:text-properties officeooo:paragraph-rsid="00106930"/>
    </style:style>
    <style:style style:name="P10" style:family="paragraph" style:parent-style-name="Standard">
      <style:paragraph-properties fo:text-align="justify" style:justify-single-word="false"/>
      <style:text-properties officeooo:paragraph-rsid="0034dea2"/>
    </style:style>
    <style:style style:name="P11" style:family="paragraph" style:parent-style-name="Standard">
      <style:paragraph-properties fo:text-align="justify" style:justify-single-word="false"/>
      <style:text-properties officeooo:paragraph-rsid="003e57f3"/>
    </style:style>
    <style:style style:name="P12" style:family="paragraph" style:parent-style-name="Standard">
      <style:paragraph-properties fo:text-align="justify" style:justify-single-word="false"/>
      <style:text-properties officeooo:paragraph-rsid="0041ab18"/>
    </style:style>
    <style:style style:name="P13" style:family="paragraph" style:parent-style-name="Standard">
      <style:paragraph-properties fo:text-align="justify" style:justify-single-word="false"/>
      <style:text-properties fo:font-size="12pt" fo:font-weight="normal" officeooo:rsid="00046c52" officeooo:paragraph-rsid="00066718" style:font-size-asian="10.5pt" style:font-weight-asian="normal" style:font-size-complex="12pt" style:font-weight-complex="normal"/>
    </style:style>
    <style:style style:name="P14" style:family="paragraph" style:parent-style-name="Standard">
      <style:text-properties fo:font-size="12pt" fo:font-weight="normal" officeooo:rsid="00066718" officeooo:paragraph-rsid="0006671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066718" officeooo:paragraph-rsid="0006671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83e17" officeooo:paragraph-rsid="00183e1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83e17" officeooo:paragraph-rsid="001f0f8d"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83e17" officeooo:paragraph-rsid="001f0f8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83e17" officeooo:paragraph-rsid="00183e1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86ce3" officeooo:paragraph-rsid="00186ce3"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86ce3" officeooo:paragraph-rsid="0022f07d"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rsid="00186ce3" officeooo:paragraph-rsid="0024cbfb"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c79f3" officeooo:paragraph-rsid="001dcd8b"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2f07d" officeooo:paragraph-rsid="0025c8ed"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rsid="0022f07d" officeooo:paragraph-rsid="0024cbfb"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officeooo:rsid="0022f07d" officeooo:paragraph-rsid="0025c8ed"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53d02" officeooo:paragraph-rsid="00253d02"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5c8ed" officeooo:paragraph-rsid="00269970"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783a8" officeooo:paragraph-rsid="0028709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87098" officeooo:paragraph-rsid="0028709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a3c5a" officeooo:paragraph-rsid="002a3c5a"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font-size="12pt" fo:font-weight="normal" officeooo:rsid="002a3c5a" officeooo:paragraph-rsid="002a3c5a"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4ecccb" officeooo:paragraph-rsid="0065db89" style:font-size-asian="12pt" style:font-weight-asian="normal" style:font-size-complex="12pt" style:font-weight-complex="normal"/>
    </style:style>
    <style:style style:name="P34" style:family="paragraph" style:parent-style-name="Standard">
      <style:text-properties fo:font-size="11pt" officeooo:rsid="00046c52" officeooo:paragraph-rsid="0016c9f9" style:font-size-asian="11pt" style:font-size-complex="11pt"/>
    </style:style>
    <style:style style:name="P35"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46c52" officeooo:paragraph-rsid="00046c52" style:font-size-asian="16pt" style:font-weight-asian="bold" style:font-size-complex="16pt" style:font-weight-complex="bold"/>
    </style:style>
    <style:style style:name="P36"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85d6d" officeooo:paragraph-rsid="00085d6d" style:font-size-asian="16pt" style:font-weight-asian="bold" style:font-size-complex="16pt" style:font-weight-complex="bold"/>
    </style:style>
    <style:style style:name="P37"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8effe" officeooo:paragraph-rsid="0008effe" style:font-size-asian="16pt" style:font-weight-asian="bold" style:font-size-complex="16pt" style:font-weight-complex="bold"/>
    </style:style>
    <style:style style:name="P38" style:family="paragraph" style:parent-style-name="Standard">
      <style:text-properties style:font-name="Liberation Sans" fo:font-size="14pt" fo:font-weight="normal" officeooo:rsid="00183e17" officeooo:paragraph-rsid="00183e17" style:font-size-asian="14pt" style:font-weight-asian="normal" style:font-size-complex="14pt" style:font-weight-complex="normal"/>
    </style:style>
    <style:style style:name="P39" style:family="paragraph" style:parent-style-name="Standard">
      <style:text-properties style:font-name="Liberation Sans" fo:font-size="14pt" fo:font-weight="normal" officeooo:rsid="001f0f8d" officeooo:paragraph-rsid="001f0f8d" style:font-size-asian="14pt" style:font-weight-asian="normal" style:font-size-complex="14pt" style:font-weight-complex="normal"/>
    </style:style>
    <style:style style:name="P40" style:family="paragraph" style:parent-style-name="Standard">
      <style:text-properties style:font-name="Liberation Sans" fo:font-size="3pt" fo:font-weight="normal" officeooo:rsid="00183e17" officeooo:paragraph-rsid="00183e17" style:font-size-asian="2.59999990463257pt" style:font-weight-asian="normal" style:font-size-complex="3pt" style:font-weight-complex="normal"/>
    </style:style>
    <style:style style:name="P41" style:family="paragraph" style:parent-style-name="Standard">
      <style:text-properties style:font-name="Liberation Sans" fo:font-size="3pt" fo:font-weight="normal" officeooo:rsid="001f0f8d" officeooo:paragraph-rsid="001f0f8d" style:font-size-asian="2.59999990463257pt" style:font-weight-asian="normal" style:font-size-complex="3pt" style:font-weight-complex="normal"/>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0400515"/>
    </style:style>
    <style:style style:name="P44" style:family="paragraph" style:parent-style-name="Standard">
      <style:paragraph-properties fo:text-align="justify" style:justify-single-word="false"/>
      <style:text-properties officeooo:rsid="000b6cdc" officeooo:paragraph-rsid="000b6cdc"/>
    </style:style>
    <style:style style:name="P45" style:family="paragraph" style:parent-style-name="Standard">
      <style:paragraph-properties fo:text-align="justify" style:justify-single-word="false"/>
      <style:text-properties officeooo:rsid="000fe15c" officeooo:paragraph-rsid="000fe15c"/>
    </style:style>
    <style:style style:name="P46" style:family="paragraph" style:parent-style-name="Standard">
      <style:paragraph-properties fo:text-align="justify" style:justify-single-word="false"/>
      <style:text-properties officeooo:rsid="00106930" officeooo:paragraph-rsid="00106930"/>
    </style:style>
    <style:style style:name="P47" style:family="paragraph" style:parent-style-name="Standard">
      <style:paragraph-properties fo:text-align="center" style:justify-single-word="false"/>
      <style:text-properties officeooo:rsid="00111105" officeooo:paragraph-rsid="00111105"/>
    </style:style>
    <style:style style:name="P48" style:family="paragraph" style:parent-style-name="Standard">
      <style:paragraph-properties fo:text-align="center" style:justify-single-word="false"/>
      <style:text-properties officeooo:rsid="00111105" officeooo:paragraph-rsid="0013a5b3"/>
    </style:style>
    <style:style style:name="P49" style:family="paragraph" style:parent-style-name="Standard">
      <style:paragraph-properties fo:text-align="justify" style:justify-single-word="false"/>
      <style:text-properties officeooo:rsid="00111105" officeooo:paragraph-rsid="00111105"/>
    </style:style>
    <style:style style:name="P50" style:family="paragraph" style:parent-style-name="Standard">
      <style:paragraph-properties fo:text-align="justify" style:justify-single-word="false"/>
      <style:text-properties officeooo:rsid="00111105" officeooo:paragraph-rsid="0013a5b3"/>
    </style:style>
    <style:style style:name="P51" style:family="paragraph" style:parent-style-name="Standard">
      <style:paragraph-properties fo:text-align="center" style:justify-single-word="false"/>
      <style:text-properties fo:font-size="6pt" officeooo:rsid="00111105" officeooo:paragraph-rsid="00111105" style:font-size-asian="5.25pt" style:font-size-complex="6pt"/>
    </style:style>
    <style:style style:name="P52" style:family="paragraph" style:parent-style-name="Standard">
      <style:paragraph-properties fo:text-align="center" style:justify-single-word="false"/>
      <style:text-properties fo:font-size="6pt" officeooo:rsid="00111105" officeooo:paragraph-rsid="0013a5b3" style:font-size-asian="5.25pt" style:font-size-complex="6pt"/>
    </style:style>
    <style:style style:name="P53" style:family="paragraph" style:parent-style-name="Standard">
      <style:paragraph-properties fo:text-align="justify" style:justify-single-word="false"/>
      <style:text-properties fo:font-size="6pt" officeooo:rsid="00111105" officeooo:paragraph-rsid="00111105" style:font-size-asian="5.25pt" style:font-size-complex="6pt"/>
    </style:style>
    <style:style style:name="P54" style:family="paragraph" style:parent-style-name="Standard">
      <style:paragraph-properties fo:text-align="justify" style:justify-single-word="false"/>
      <style:text-properties fo:font-size="6pt" officeooo:paragraph-rsid="003e57f3" style:font-size-asian="5.25pt" style:font-size-complex="6pt"/>
    </style:style>
    <style:style style:name="P55" style:family="paragraph" style:parent-style-name="Standard">
      <style:paragraph-properties fo:text-align="justify" style:justify-single-word="false"/>
      <style:text-properties fo:font-size="6pt" officeooo:paragraph-rsid="00400515" style:font-size-asian="5.25pt" style:font-size-complex="6pt"/>
    </style:style>
    <style:style style:name="P56" style:family="paragraph" style:parent-style-name="Standard">
      <style:paragraph-properties fo:text-align="center" style:justify-single-word="false"/>
      <style:text-properties fo:font-size="6pt" officeooo:paragraph-rsid="00400515" style:font-size-asian="5.25pt" style:font-size-complex="6pt"/>
    </style:style>
    <style:style style:name="P57" style:family="paragraph" style:parent-style-name="Standard">
      <style:text-properties fo:font-size="6pt" fo:font-weight="normal" officeooo:rsid="00183e17" officeooo:paragraph-rsid="00183e17" style:font-size-asian="5.25pt" style:font-weight-asian="normal" style:font-size-complex="6pt" style:font-weight-complex="normal"/>
    </style:style>
    <style:style style:name="P58" style:family="paragraph" style:parent-style-name="Standard">
      <style:paragraph-properties fo:text-align="center" style:justify-single-word="false"/>
      <style:text-properties fo:font-size="6pt" fo:font-weight="normal" officeooo:rsid="00183e17" officeooo:paragraph-rsid="00183e17" style:font-size-asian="5.25pt" style:font-weight-asian="normal" style:font-size-complex="6pt" style:font-weight-complex="normal"/>
    </style:style>
    <style:style style:name="P59" style:family="paragraph" style:parent-style-name="Standard">
      <style:paragraph-properties fo:text-align="center" style:justify-single-word="false"/>
      <style:text-properties fo:font-size="6pt" fo:font-weight="normal" officeooo:rsid="00183e17" officeooo:paragraph-rsid="001f0f8d" style:font-size-asian="5.25pt" style:font-weight-asian="normal" style:font-size-complex="6pt" style:font-weight-complex="normal"/>
    </style:style>
    <style:style style:name="P60" style:family="paragraph" style:parent-style-name="Standard">
      <style:text-properties fo:font-size="6pt" fo:font-weight="normal" officeooo:rsid="00183e17" officeooo:paragraph-rsid="001f0f8d" style:font-size-asian="5.25pt" style:font-weight-asian="normal" style:font-size-complex="6pt" style:font-weight-complex="normal"/>
    </style:style>
    <style:style style:name="P61" style:family="paragraph" style:parent-style-name="Standard">
      <style:paragraph-properties fo:text-align="justify" style:justify-single-word="false"/>
      <style:text-properties fo:font-size="6pt" fo:font-weight="normal" officeooo:rsid="0022f07d" officeooo:paragraph-rsid="0025c8ed" style:font-size-asian="5.25pt" style:font-weight-asian="normal" style:font-size-complex="6pt" style:font-weight-complex="normal"/>
    </style:style>
    <style:style style:name="P62" style:family="paragraph" style:parent-style-name="Standard">
      <style:paragraph-properties fo:text-align="center" style:justify-single-word="false"/>
      <style:text-properties fo:font-size="6pt" fo:font-weight="normal" officeooo:rsid="0022f07d" officeooo:paragraph-rsid="0025c8ed" style:font-size-asian="5.25pt" style:font-weight-asian="normal" style:font-size-complex="6pt" style:font-weight-complex="normal"/>
    </style:style>
    <style:style style:name="P63" style:family="paragraph" style:parent-style-name="Standard">
      <style:paragraph-properties fo:text-align="justify" style:justify-single-word="false"/>
      <style:text-properties fo:font-size="6pt" fo:font-weight="normal" officeooo:rsid="00253d02" officeooo:paragraph-rsid="00253d02" style:font-size-asian="5.25pt" style:font-weight-asian="normal" style:font-size-complex="6pt" style:font-weight-complex="normal"/>
    </style:style>
    <style:style style:name="P64" style:family="paragraph" style:parent-style-name="Standard">
      <style:paragraph-properties fo:text-align="justify" style:justify-single-word="false"/>
      <style:text-properties fo:font-size="6pt" fo:font-weight="normal" officeooo:rsid="002a3c5a" officeooo:paragraph-rsid="002a3c5a" style:font-size-asian="5.25pt" style:font-weight-asian="normal" style:font-size-complex="6pt" style:font-weight-complex="normal"/>
    </style:style>
    <style:style style:name="P65" style:family="paragraph" style:parent-style-name="Standard">
      <style:paragraph-properties fo:text-align="center" style:justify-single-word="false"/>
      <style:text-properties fo:font-size="6pt" fo:font-weight="normal" officeooo:rsid="002a3c5a" officeooo:paragraph-rsid="002a3c5a" style:font-size-asian="5.25pt" style:font-weight-asian="normal" style:font-size-complex="6pt" style:font-weight-complex="normal"/>
    </style:style>
    <style:style style:name="P66" style:family="paragraph" style:parent-style-name="Standard">
      <style:paragraph-properties fo:text-align="justify" style:justify-single-word="false"/>
      <style:text-properties officeooo:rsid="0013a5b3" officeooo:paragraph-rsid="0013a5b3"/>
    </style:style>
    <style:style style:name="P67" style:family="paragraph" style:parent-style-name="Standard">
      <style:paragraph-properties fo:text-align="justify" style:justify-single-word="false"/>
      <style:text-properties officeooo:rsid="00143d92" officeooo:paragraph-rsid="00143d92"/>
    </style:style>
    <style:style style:name="P68" style:family="paragraph" style:parent-style-name="Standard">
      <style:paragraph-properties fo:text-align="justify" style:justify-single-word="false"/>
      <style:text-properties officeooo:rsid="00143d92" officeooo:paragraph-rsid="005b1442"/>
    </style:style>
    <style:style style:name="P69" style:family="paragraph" style:parent-style-name="Standard">
      <style:paragraph-properties fo:text-align="justify" style:justify-single-word="false"/>
      <style:text-properties officeooo:rsid="00158149" officeooo:paragraph-rsid="00158149"/>
    </style:style>
    <style:style style:name="P70" style:family="paragraph" style:parent-style-name="Standard">
      <style:text-properties officeooo:rsid="00158149" officeooo:paragraph-rsid="00158149"/>
    </style:style>
    <style:style style:name="P71" style:family="paragraph" style:parent-style-name="Standard">
      <style:text-properties officeooo:paragraph-rsid="0016c9f9"/>
    </style:style>
    <style:style style:name="P72" style:family="paragraph" style:parent-style-name="Standard">
      <style:text-properties officeooo:rsid="001ea2fb" officeooo:paragraph-rsid="001ea2fb"/>
    </style:style>
    <style:style style:name="P73" style:family="paragraph" style:parent-style-name="Standard">
      <style:text-properties officeooo:rsid="001ea2fb" officeooo:paragraph-rsid="001f0f8d"/>
    </style:style>
    <style:style style:name="P74" style:family="paragraph" style:parent-style-name="Standard">
      <style:text-properties fo:font-size="14pt" officeooo:rsid="00046c52" officeooo:paragraph-rsid="00046c52" style:font-size-asian="14pt" style:font-size-complex="14pt"/>
    </style:style>
    <style:style style:name="P75" style:family="paragraph" style:parent-style-name="Standard">
      <style:paragraph-properties fo:text-align="justify" style:justify-single-word="false"/>
      <style:text-properties officeooo:rsid="000a7a34" officeooo:paragraph-rsid="000a7a34"/>
    </style:style>
    <style:style style:name="P76" style:family="paragraph" style:parent-style-name="Standard">
      <style:paragraph-properties fo:text-align="justify" style:justify-single-word="false"/>
      <style:text-properties style:font-name="Liberation Serif" fo:font-style="normal" officeooo:rsid="0013b10a" officeooo:paragraph-rsid="0013a5b3" style:font-style-asian="normal" style:font-style-complex="normal"/>
    </style:style>
    <style:style style:name="P77" style:family="paragraph" style:parent-style-name="Standard">
      <style:paragraph-properties fo:text-align="justify" style:justify-single-word="false"/>
      <style:text-properties style:font-name="Liberation Serif" fo:font-style="normal" officeooo:rsid="00158149" officeooo:paragraph-rsid="00158149" style:font-style-asian="normal" style:font-style-complex="normal"/>
    </style:style>
    <style:style style:name="P78" style:family="paragraph" style:parent-style-name="Standard">
      <style:paragraph-properties fo:text-align="justify" style:justify-single-word="false"/>
      <style:text-properties style:font-name="Liberation Serif" fo:font-style="normal" officeooo:rsid="00143d92" officeooo:paragraph-rsid="00143d92" style:font-style-asian="normal" style:font-style-complex="normal"/>
    </style:style>
    <style:style style:name="P79" style:family="paragraph" style:parent-style-name="Standard">
      <style:paragraph-properties fo:text-align="justify" style:justify-single-word="false"/>
      <style:text-properties style:text-position="0% 100%" style:font-name="Liberation Serif1" fo:font-size="6pt" fo:font-weight="normal" officeooo:rsid="001c79f3" officeooo:paragraph-rsid="001dcd8b" style:font-size-asian="5.25pt" style:font-weight-asian="normal" style:font-size-complex="6pt" style:font-weight-complex="normal"/>
    </style:style>
    <style:style style:name="P80" style:family="paragraph" style:parent-style-name="Standard">
      <style:paragraph-properties fo:text-align="justify" style:justify-single-word="false"/>
      <style:text-properties officeooo:rsid="002c3584" officeooo:paragraph-rsid="003ba0f3"/>
    </style:style>
    <style:style style:name="P81" style:family="paragraph" style:parent-style-name="Standard">
      <style:paragraph-properties fo:text-align="justify" style:justify-single-word="false"/>
      <style:text-properties officeooo:rsid="002c3a4e" officeooo:paragraph-rsid="002d0458"/>
    </style:style>
    <style:style style:name="P82" style:family="paragraph" style:parent-style-name="Standard">
      <style:paragraph-properties fo:text-align="justify" style:justify-single-word="false"/>
      <style:text-properties officeooo:rsid="002d0458" officeooo:paragraph-rsid="002eb573"/>
    </style:style>
    <style:style style:name="P83" style:family="paragraph" style:parent-style-name="Standard">
      <style:paragraph-properties fo:text-align="justify" style:justify-single-word="false"/>
      <style:text-properties officeooo:rsid="00321b5b" officeooo:paragraph-rsid="00321b5b"/>
    </style:style>
    <style:style style:name="P84" style:family="paragraph" style:parent-style-name="Standard">
      <style:paragraph-properties fo:text-align="justify" style:justify-single-word="false"/>
      <style:text-properties officeooo:rsid="0033e2bd" officeooo:paragraph-rsid="0033e2bd"/>
    </style:style>
    <style:style style:name="P85" style:family="paragraph" style:parent-style-name="Standard">
      <style:paragraph-properties fo:text-align="justify" style:justify-single-word="false"/>
      <style:text-properties officeooo:rsid="0033fa03" officeooo:paragraph-rsid="0033fa03"/>
    </style:style>
    <style:style style:name="P86" style:family="paragraph" style:parent-style-name="Standard">
      <style:paragraph-properties fo:text-align="justify" style:justify-single-word="false"/>
      <style:text-properties officeooo:rsid="003a7e06" officeooo:paragraph-rsid="003a7e06"/>
    </style:style>
    <style:style style:name="P87" style:family="paragraph" style:parent-style-name="Standard">
      <style:paragraph-properties fo:text-align="justify" style:justify-single-word="false"/>
      <style:text-properties officeooo:rsid="0042b8ad" officeooo:paragraph-rsid="0042b8ad"/>
    </style:style>
    <style:style style:name="P88" style:family="paragraph" style:parent-style-name="Standard">
      <style:paragraph-properties fo:text-align="justify" style:justify-single-word="false"/>
      <style:text-properties officeooo:rsid="0043874b" officeooo:paragraph-rsid="0044ddc4"/>
    </style:style>
    <style:style style:name="P89" style:family="paragraph" style:parent-style-name="Standard">
      <style:paragraph-properties fo:text-align="start" style:justify-single-word="false"/>
      <style:text-properties officeooo:rsid="004ad792" officeooo:paragraph-rsid="004cbde5"/>
    </style:style>
    <style:style style:name="P90" style:family="paragraph" style:parent-style-name="Standard">
      <style:paragraph-properties fo:text-align="justify" style:justify-single-word="false"/>
      <style:text-properties officeooo:rsid="004e76fb" officeooo:paragraph-rsid="004e76fb"/>
    </style:style>
    <style:style style:name="P91" style:family="paragraph" style:parent-style-name="Standard">
      <style:paragraph-properties fo:text-align="justify" style:justify-single-word="false"/>
      <style:text-properties officeooo:rsid="00519f35" officeooo:paragraph-rsid="00519f35"/>
    </style:style>
    <style:style style:name="P92" style:family="paragraph" style:parent-style-name="Standard">
      <style:paragraph-properties fo:text-align="justify" style:justify-single-word="false"/>
      <style:text-properties officeooo:rsid="00539525" officeooo:paragraph-rsid="00539525"/>
    </style:style>
    <style:style style:name="P93" style:family="paragraph" style:parent-style-name="Standard">
      <style:paragraph-properties fo:text-align="justify" style:justify-single-word="false"/>
      <style:text-properties officeooo:rsid="0055c89f" officeooo:paragraph-rsid="0062bca1"/>
    </style:style>
    <style:style style:name="P94" style:family="paragraph" style:parent-style-name="Text_20_body">
      <style:text-properties officeooo:paragraph-rsid="003d3a30"/>
    </style:style>
    <style:style style:name="P95" style:family="paragraph" style:parent-style-name="Standard" style:list-style-name="L1">
      <style:paragraph-properties fo:text-align="justify" style:justify-single-word="false"/>
      <style:text-properties fo:font-size="12pt" fo:font-weight="normal" officeooo:rsid="00066718" officeooo:paragraph-rsid="00066718"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2pt" fo:font-weight="normal" officeooo:rsid="00066718" officeooo:paragraph-rsid="00066718"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font-size="12pt" fo:font-weight="normal" officeooo:rsid="00689a9f" officeooo:paragraph-rsid="00689a9f" style:font-size-asian="10.5pt" style:font-weight-asian="normal" style:font-size-complex="12pt" style:font-weight-complex="normal"/>
    </style:style>
    <style:style style:name="P98" style:family="paragraph" style:parent-style-name="Standard" style:list-style-name="L4">
      <style:paragraph-properties fo:text-align="justify" style:justify-single-word="false"/>
      <style:text-properties fo:font-size="12pt" fo:font-weight="normal" officeooo:rsid="001dcd8b" officeooo:paragraph-rsid="001dcd8b" style:font-size-asian="12pt" style:font-weight-asian="normal" style:font-size-complex="12pt" style:font-weight-complex="normal"/>
    </style:style>
    <style:style style:name="P99" style:family="paragraph" style:parent-style-name="Standard" style:list-style-name="L4">
      <style:paragraph-properties fo:text-align="justify" style:justify-single-word="false"/>
      <style:text-properties fo:font-size="12pt" fo:font-weight="normal" officeooo:rsid="001ea2fb" officeooo:paragraph-rsid="002a3c5a" style:font-size-asian="12pt" style:font-weight-asian="normal" style:font-size-complex="12pt" style:font-weight-complex="normal"/>
    </style:style>
    <style:style style:name="P100" style:family="paragraph" style:parent-style-name="Standard">
      <style:paragraph-properties fo:text-align="center" style:justify-single-word="false"/>
      <style:text-properties fo:font-size="12pt" fo:font-weight="normal" officeooo:rsid="002a3c5a" officeooo:paragraph-rsid="002c3584" style:font-size-asian="12pt" style:font-weight-asian="normal" style:font-size-complex="12pt" style:font-weight-complex="normal"/>
    </style:style>
    <style:style style:name="P101" style:family="paragraph" style:parent-style-name="Standard" style:list-style-name="L4">
      <style:paragraph-properties fo:text-align="justify" style:justify-single-word="false"/>
      <style:text-properties fo:font-size="12pt" fo:font-style="normal" style:text-underline-style="none" fo:font-weight="normal" officeooo:rsid="001dcd8b" officeooo:paragraph-rsid="001dcd8b" style:font-size-asian="12pt" style:font-style-asian="normal" style:font-weight-asian="normal" style:font-size-complex="12pt" style:font-style-complex="normal" style:font-weight-complex="normal"/>
    </style:style>
    <style:style style:name="P102" style:family="paragraph" style:parent-style-name="Standard" style:list-style-name="L4">
      <style:paragraph-properties fo:text-align="justify" style:justify-single-word="false"/>
      <style:text-properties fo:font-size="12pt" fo:font-style="normal" style:text-underline-style="none" fo:font-weight="normal" officeooo:rsid="001e161b" officeooo:paragraph-rsid="002a3c5a"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font-size="12pt" officeooo:rsid="006978d4" officeooo:paragraph-rsid="006978d4" style:font-size-asian="12pt" style:font-size-complex="12pt"/>
    </style:style>
    <style:style style:name="P104" style:family="paragraph" style:parent-style-name="Standard">
      <style:paragraph-properties fo:text-align="justify" style:justify-single-word="false"/>
      <style:text-properties fo:font-size="12pt" officeooo:rsid="006978d4" officeooo:paragraph-rsid="0069da99" style:font-size-asian="12pt" style:font-size-complex="12pt"/>
    </style:style>
    <style:style style:name="P105" style:family="paragraph" style:parent-style-name="Standard">
      <style:paragraph-properties fo:text-align="justify" style:justify-single-word="false"/>
      <style:text-properties fo:font-size="12pt" officeooo:rsid="006978d4" officeooo:paragraph-rsid="006b2b9b" style:font-size-asian="12pt" style:font-size-complex="12pt"/>
    </style:style>
    <style:style style:name="P106" style:family="paragraph" style:parent-style-name="Standard">
      <style:paragraph-properties fo:text-align="justify" style:justify-single-word="false"/>
      <style:text-properties fo:font-size="12pt" officeooo:rsid="006978d4" officeooo:paragraph-rsid="006e8863" style:font-size-asian="12pt" style:font-size-complex="12pt"/>
    </style:style>
    <style:style style:name="P107" style:family="paragraph" style:parent-style-name="Standard">
      <style:paragraph-properties fo:text-align="justify" style:justify-single-word="false"/>
      <style:text-properties fo:font-size="12pt" officeooo:rsid="006978d4" officeooo:paragraph-rsid="006f72e3" style:font-size-asian="12pt" style:font-size-complex="12pt"/>
    </style:style>
    <style:style style:name="P108" style:family="paragraph" style:parent-style-name="Standard" style:list-style-name="L8">
      <style:paragraph-properties fo:text-align="justify" style:justify-single-word="false"/>
      <style:text-properties fo:font-size="12pt" officeooo:rsid="006f72e3" officeooo:paragraph-rsid="006f72e3" style:font-size-asian="12pt" style:font-size-complex="12pt"/>
    </style:style>
    <style:style style:name="P109" style:family="paragraph" style:parent-style-name="Standard" style:list-style-name="L8">
      <style:paragraph-properties fo:text-align="justify" style:justify-single-word="false"/>
      <style:text-properties fo:font-size="12pt" officeooo:rsid="00709dab" officeooo:paragraph-rsid="00709dab" style:font-size-asian="12pt" style:font-size-complex="12pt"/>
    </style:style>
    <style:style style:name="P110" style:family="paragraph" style:parent-style-name="Standard">
      <style:paragraph-properties fo:text-align="justify" style:justify-single-word="false"/>
      <style:text-properties fo:font-size="12pt" officeooo:rsid="00709dab" officeooo:paragraph-rsid="00709dab" style:font-size-asian="12pt" style:font-size-complex="12pt"/>
    </style:style>
    <style:style style:name="P111" style:family="paragraph" style:parent-style-name="Standard" style:list-style-name="L2">
      <style:paragraph-properties fo:text-align="justify" style:justify-single-word="false"/>
      <style:text-properties officeooo:rsid="000fe15c" officeooo:paragraph-rsid="000fe15c"/>
    </style:style>
    <style:style style:name="P112" style:family="paragraph" style:parent-style-name="Standard" style:list-style-name="L3">
      <style:paragraph-properties fo:text-align="justify" style:justify-single-word="false"/>
      <style:text-properties officeooo:rsid="00106930" officeooo:paragraph-rsid="00106930"/>
    </style:style>
    <style:style style:name="P113" style:family="paragraph" style:parent-style-name="Standard">
      <loext:graphic-properties draw:fill-gradient-name="gradient" draw:fill-hatch-name="hatch"/>
      <style:paragraph-properties fo:margin-top="0in" fo:margin-bottom="0.0799in" style:contextual-spacing="false"/>
      <style:text-properties style:font-name="Liberation Sans" fo:font-size="16pt" fo:font-weight="bold" officeooo:rsid="00085d6d" officeooo:paragraph-rsid="00085d6d" style:font-size-asian="16pt" style:font-weight-asian="bold" style:font-size-complex="16pt" style:font-weight-complex="bold"/>
    </style:style>
    <style:style style:name="P114" style:family="paragraph" style:parent-style-name="Standard">
      <style:paragraph-properties fo:text-align="justify" style:justify-single-word="false"/>
      <style:text-properties style:text-position="0% 100%" style:font-name="Liberation Serif" fo:font-size="6pt" fo:font-style="normal" fo:font-weight="normal" officeooo:rsid="00303906" officeooo:paragraph-rsid="00303906" style:font-name-asian="Liberation Serif" style:font-size-asian="5.25pt" style:font-style-asian="normal" style:font-weight-asian="normal" style:font-name-complex="Liberation Serif" style:font-size-complex="6pt" style:font-style-complex="normal" style:font-weight-complex="normal"/>
    </style:style>
    <style:style style:name="P115" style:family="paragraph" style:parent-style-name="Standard">
      <style:paragraph-properties fo:text-align="center" style:justify-single-word="false"/>
      <style:text-properties style:text-position="0% 100%" style:font-name="Liberation Serif" fo:font-size="6pt" fo:font-style="normal" fo:font-weight="normal" officeooo:rsid="00303906" officeooo:paragraph-rsid="00303906" style:font-name-asian="Liberation Serif" style:font-size-asian="5.25pt" style:font-style-asian="normal" style:font-weight-asian="normal" style:font-name-complex="Liberation Serif" style:font-size-complex="6pt" style:font-style-complex="normal" style:font-weight-complex="normal"/>
    </style:style>
    <style:style style:name="P116" style:family="paragraph" style:parent-style-name="Standard">
      <style:paragraph-properties fo:text-align="center" style:justify-single-word="false"/>
      <style:text-properties style:text-position="0% 100%" style:font-name="Liberation Serif" fo:font-size="12pt" fo:font-style="normal" fo:font-weight="normal" officeooo:rsid="00303906" officeooo:paragraph-rsid="00303906" style:font-name-asian="Liberation Serif" style:font-size-asian="12pt" style:font-style-asian="normal" style:font-weight-asian="normal" style:font-name-complex="Liberation Serif" style:font-size-complex="12pt" style:font-style-complex="normal" style:font-weight-complex="normal"/>
    </style:style>
    <style:style style:name="P117" style:family="paragraph" style:parent-style-name="Standard">
      <style:paragraph-properties fo:text-align="justify" style:justify-single-word="false"/>
      <style:text-properties style:text-position="0% 100%" style:font-name="Liberation Serif" fo:font-size="12pt" fo:font-style="italic" fo:font-weight="normal" officeooo:rsid="003ba0f3" officeooo:paragraph-rsid="003ba0f3" style:font-name-asian="Liberation Serif" style:font-size-asian="12pt" style:font-style-asian="italic" style:font-weight-asian="normal" style:font-name-complex="Liberation Serif" style:font-size-complex="12pt" style:font-style-complex="italic" style:font-weight-complex="normal"/>
    </style:style>
    <style:style style:name="P118" style:family="paragraph" style:parent-style-name="Standard" style:list-style-name="L5">
      <style:paragraph-properties fo:text-align="center" style:justify-single-word="false"/>
      <style:text-properties style:text-position="0% 100%" style:font-name="Liberation Serif1" fo:font-style="normal" officeooo:rsid="004ad792" officeooo:paragraph-rsid="004cbde5" style:font-style-asian="normal" style:font-style-complex="normal"/>
    </style:style>
    <style:style style:name="P119" style:family="paragraph" style:parent-style-name="Standard">
      <style:paragraph-properties fo:text-align="start" style:justify-single-word="false"/>
      <style:text-properties style:text-position="0% 100%" style:font-name="Liberation Serif1" fo:font-style="normal" officeooo:rsid="004cbde5" officeooo:paragraph-rsid="004cbde5" style:font-style-asian="normal" style:font-style-complex="normal"/>
    </style:style>
    <style:style style:name="P120" style:family="paragraph" style:parent-style-name="Standard">
      <style:paragraph-properties fo:text-align="justify" style:justify-single-word="false"/>
      <style:text-properties style:text-position="0% 100%" style:font-name="Liberation Serif1" fo:font-style="normal" fo:font-weight="normal" officeooo:rsid="004e44d0" officeooo:paragraph-rsid="00400515" style:font-style-asian="normal" style:font-style-complex="normal"/>
    </style:style>
    <style:style style:name="P121" style:family="paragraph" style:parent-style-name="Standard">
      <style:paragraph-properties fo:text-align="justify" style:justify-single-word="false"/>
      <style:text-properties style:text-position="0% 100%" style:font-name="Liberation Serif1" fo:font-style="normal" fo:font-weight="normal" officeooo:rsid="00509ced" officeooo:paragraph-rsid="004e76fb" style:font-style-asian="normal" style:font-style-complex="normal"/>
    </style:style>
    <style:style style:name="P122" style:family="paragraph" style:parent-style-name="Standard">
      <style:paragraph-properties fo:text-align="center" style:justify-single-word="false"/>
      <style:text-properties style:text-position="0% 100%" style:font-name="Liberation Serif1" fo:font-style="normal" fo:font-weight="normal" officeooo:rsid="00509ced" officeooo:paragraph-rsid="004e76fb" style:font-style-asian="normal" style:font-style-complex="normal"/>
    </style:style>
    <style:style style:name="P123" style:family="paragraph" style:parent-style-name="Standard">
      <style:paragraph-properties fo:text-align="justify" style:justify-single-word="false"/>
      <style:text-properties style:text-position="0% 100%" style:font-name="Liberation Serif1" fo:font-style="normal" fo:font-weight="normal" officeooo:rsid="00539525" officeooo:paragraph-rsid="00539525" style:font-style-asian="normal" style:font-style-complex="normal"/>
    </style:style>
    <style:style style:name="P124" style:family="paragraph" style:parent-style-name="Standard">
      <style:paragraph-properties fo:text-align="justify" style:justify-single-word="false"/>
      <style:text-properties style:text-position="0% 100%" style:font-name="Liberation Serif1" fo:font-size="6pt" fo:font-style="normal" fo:font-weight="normal" officeooo:rsid="00519f35" officeooo:paragraph-rsid="00519f35" style:font-size-asian="5.25pt" style:font-style-asian="normal" style:font-size-complex="6pt" style:font-style-complex="normal"/>
    </style:style>
    <style:style style:name="P125" style:family="paragraph" style:parent-style-name="Standard">
      <style:paragraph-properties fo:text-align="center" style:justify-single-word="false"/>
      <style:text-properties style:text-position="0% 100%" style:font-name="Liberation Serif1" fo:font-size="6pt" fo:font-style="normal" fo:font-weight="normal" officeooo:rsid="00509ced" officeooo:paragraph-rsid="004e76fb" style:font-size-asian="5.25pt" style:font-style-asian="normal" style:font-size-complex="6pt" style:font-style-complex="normal"/>
    </style:style>
    <style:style style:name="P126" style:family="paragraph" style:parent-style-name="Standard">
      <style:paragraph-properties fo:text-align="justify" style:justify-single-word="false"/>
      <style:text-properties fo:font-size="6pt" fo:font-weight="normal" officeooo:paragraph-rsid="00400515" style:font-size-asian="5.25pt" style:font-size-complex="6pt"/>
    </style:style>
    <style:style style:name="P127" style:family="paragraph" style:parent-style-name="Standard">
      <style:paragraph-properties fo:text-align="justify" style:justify-single-word="false"/>
      <style:text-properties fo:font-size="6pt" fo:font-weight="normal" officeooo:rsid="0041ab18" officeooo:paragraph-rsid="0041ab18" style:font-size-asian="5.25pt" style:font-size-complex="6pt"/>
    </style:style>
    <style:style style:name="P128" style:family="paragraph" style:parent-style-name="Standard">
      <style:paragraph-properties fo:text-align="center" style:justify-single-word="false"/>
      <style:text-properties fo:font-size="6pt" fo:font-weight="normal" officeooo:rsid="0041ab18" officeooo:paragraph-rsid="0041ab18" style:font-size-asian="5.25pt" style:font-size-complex="6pt"/>
    </style:style>
    <style:style style:name="P129" style:family="paragraph" style:parent-style-name="Standard">
      <style:paragraph-properties fo:text-align="justify" style:justify-single-word="false"/>
      <style:text-properties fo:font-weight="normal" officeooo:paragraph-rsid="00400515"/>
    </style:style>
    <style:style style:name="P130" style:family="paragraph" style:parent-style-name="Standard">
      <style:paragraph-properties fo:text-align="center" style:justify-single-word="false"/>
      <style:text-properties fo:font-weight="normal" officeooo:rsid="0041ab18" officeooo:paragraph-rsid="0041ab18"/>
    </style:style>
    <style:style style:name="P131" style:family="paragraph" style:parent-style-name="Standard" style:list-style-name="L5">
      <style:paragraph-properties fo:text-align="justify" style:justify-single-word="false"/>
      <style:text-properties officeooo:rsid="0042b8ad" officeooo:paragraph-rsid="0042b8ad"/>
    </style:style>
    <style:style style:name="P132" style:family="paragraph" style:parent-style-name="Standard" style:list-style-name="L5">
      <style:paragraph-properties fo:text-align="justify" style:justify-single-word="false"/>
      <style:text-properties officeooo:rsid="0042b8ad" officeooo:paragraph-rsid="0043874b"/>
    </style:style>
    <style:style style:name="P133" style:family="paragraph" style:parent-style-name="Standard" style:list-style-name="L5">
      <style:paragraph-properties fo:text-align="justify" style:justify-single-word="false"/>
      <style:text-properties officeooo:rsid="0044ddc4" officeooo:paragraph-rsid="0044ddc4"/>
    </style:style>
    <style:style style:name="P134" style:family="paragraph" style:parent-style-name="Standard" style:list-style-name="L5">
      <style:paragraph-properties fo:text-align="justify" style:justify-single-word="false"/>
      <style:text-properties officeooo:paragraph-rsid="0044ddc4"/>
    </style:style>
    <style:style style:name="P135" style:family="paragraph" style:parent-style-name="Standard" style:list-style-name="L6">
      <style:paragraph-properties fo:text-align="justify" style:justify-single-word="false"/>
      <style:text-properties officeooo:paragraph-rsid="0034dea2"/>
    </style:style>
    <style:style style:name="P136" style:family="paragraph" style:parent-style-name="Standard" style:list-style-name="L5">
      <style:paragraph-properties fo:text-align="justify" style:justify-single-word="false"/>
      <style:text-properties officeooo:rsid="00460240" officeooo:paragraph-rsid="00460240"/>
    </style:style>
    <style:style style:name="P137" style:family="paragraph" style:parent-style-name="Standard" style:list-style-name="L5">
      <style:paragraph-properties fo:text-align="justify" style:justify-single-word="false"/>
      <style:text-properties officeooo:rsid="00493cf7" officeooo:paragraph-rsid="00493cf7"/>
    </style:style>
    <style:style style:name="P138" style:family="paragraph" style:parent-style-name="Standard" style:list-style-name="L5">
      <style:paragraph-properties fo:text-align="justify" style:justify-single-word="false"/>
      <style:text-properties officeooo:rsid="004ad792" officeooo:paragraph-rsid="004cbde5"/>
    </style:style>
    <style:style style:name="P139" style:family="paragraph" style:parent-style-name="Standard" style:list-style-name="L5">
      <style:paragraph-properties fo:text-align="justify" style:justify-single-word="false"/>
      <style:text-properties officeooo:rsid="004cbde5" officeooo:paragraph-rsid="004cbde5"/>
    </style:style>
    <style:style style:name="P140" style:family="paragraph" style:parent-style-name="Standard" style:list-style-name="L6">
      <style:paragraph-properties fo:text-align="justify" style:justify-single-word="false"/>
      <style:text-properties officeooo:rsid="0033fa03" officeooo:paragraph-rsid="0033fa03"/>
    </style:style>
    <style:style style:name="P141" style:family="paragraph" style:parent-style-name="Standard" style:list-style-name="L7">
      <style:paragraph-properties fo:text-align="justify" style:justify-single-word="false"/>
      <style:text-properties officeooo:rsid="00321b5b" officeooo:paragraph-rsid="00321b5b"/>
    </style:style>
    <style:style style:name="P142" style:family="paragraph" style:parent-style-name="Standard" style:list-style-name="L7">
      <style:paragraph-properties fo:text-align="justify" style:justify-single-word="false"/>
      <style:text-properties officeooo:rsid="0033e2bd" officeooo:paragraph-rsid="00321b5b"/>
    </style:style>
    <style:style style:name="P143" style:family="paragraph" style:parent-style-name="Standard" style:list-style-name="L7">
      <style:paragraph-properties fo:text-align="justify" style:justify-single-word="false"/>
      <style:text-properties officeooo:rsid="0033e2bd" officeooo:paragraph-rsid="0033e2bd"/>
    </style:style>
    <style:style style:name="P144" style:family="paragraph" style:parent-style-name="Standard">
      <style:paragraph-properties fo:text-align="justify" style:justify-single-word="false"/>
      <style:text-properties officeooo:rsid="0062bca1" officeooo:paragraph-rsid="0062bca1"/>
    </style:style>
    <style:style style:name="P145" style:family="paragraph" style:parent-style-name="Standard">
      <style:text-properties officeooo:rsid="001ea2fb" officeooo:paragraph-rsid="001f0f8d"/>
    </style:style>
    <style:style style:name="P146" style:family="paragraph" style:parent-style-name="Standard">
      <style:paragraph-properties fo:text-align="justify" style:justify-single-word="false"/>
      <style:text-properties officeooo:rsid="0069da99" officeooo:paragraph-rsid="0069da99"/>
    </style:style>
    <style:style style:name="P147" style:family="paragraph" style:parent-style-name="Standard">
      <style:paragraph-properties fo:text-align="justify" style:justify-single-word="false"/>
      <style:text-properties style:font-name="Liberation Sans" fo:font-size="14pt" officeooo:rsid="006978d4" officeooo:paragraph-rsid="006978d4" style:font-size-asian="14pt" style:font-size-complex="14pt"/>
    </style:style>
    <style:style style:name="P148" style:family="paragraph" style:parent-style-name="Standard">
      <style:paragraph-properties fo:text-align="justify" style:justify-single-word="false"/>
      <style:text-properties style:font-name="Liberation Sans" fo:font-size="14pt" officeooo:rsid="006978d4" officeooo:paragraph-rsid="0069da99" style:font-size-asian="14pt" style:font-size-complex="14pt"/>
    </style:style>
    <style:style style:name="P149" style:family="paragraph" style:parent-style-name="Standard">
      <style:paragraph-properties fo:text-align="justify" style:justify-single-word="false"/>
      <style:text-properties style:font-name="Liberation Sans" fo:font-size="14pt" officeooo:rsid="006978d4" officeooo:paragraph-rsid="006b2b9b" style:font-size-asian="14pt" style:font-size-complex="14pt"/>
    </style:style>
    <style:style style:name="P150" style:family="paragraph" style:parent-style-name="Standard">
      <style:paragraph-properties fo:text-align="justify" style:justify-single-word="false"/>
      <style:text-properties style:font-name="Liberation Sans" fo:font-size="14pt" officeooo:rsid="006b2b9b" officeooo:paragraph-rsid="006b2b9b" style:font-size-asian="14pt" style:font-size-complex="14pt"/>
    </style:style>
    <style:style style:name="P151" style:family="paragraph" style:parent-style-name="Standard">
      <style:paragraph-properties fo:text-align="justify" style:justify-single-word="false"/>
      <style:text-properties officeooo:rsid="0055c89f" officeooo:paragraph-rsid="006b2b9b"/>
    </style:style>
    <style:style style:name="P152" style:family="paragraph" style:parent-style-name="Standard">
      <style:paragraph-properties fo:text-align="justify" style:justify-single-word="false"/>
      <style:text-properties officeooo:rsid="006bb49f" officeooo:paragraph-rsid="006bb49f"/>
    </style:style>
    <style:style style:name="P153" style:family="paragraph" style:parent-style-name="Standard">
      <style:text-properties officeooo:rsid="00046c52" officeooo:paragraph-rsid="00046c52"/>
    </style:style>
    <style:style style:name="P154" style:family="paragraph" style:parent-style-name="Standard">
      <style:text-properties officeooo:rsid="006d7d26" officeooo:paragraph-rsid="006d7d26"/>
    </style:style>
    <style:style style:name="T1" style:family="text">
      <style:text-properties fo:font-size="14pt" style:font-size-asian="14pt" style:font-size-complex="14pt"/>
    </style:style>
    <style:style style:name="T2" style:family="text">
      <style:text-properties fo:font-size="14pt" officeooo:rsid="00158149" style:font-size-asian="14pt" style:font-size-complex="14pt"/>
    </style:style>
    <style:style style:name="T3" style:family="text">
      <style:text-properties officeooo:rsid="00085d6d"/>
    </style:style>
    <style:style style:name="T4" style:family="text">
      <style:text-properties officeooo:rsid="0008effe"/>
    </style:style>
    <style:style style:name="T5" style:family="text">
      <style:text-properties fo:font-style="italic" style:font-style-asian="italic" style:font-style-complex="italic"/>
    </style:style>
    <style:style style:name="T6" style:family="text">
      <style:text-properties fo:font-style="italic" officeooo:rsid="0013b10a" style:font-style-asian="italic" style:font-style-complex="italic"/>
    </style:style>
    <style:style style:name="T7" style:family="text">
      <style:text-properties fo:font-style="italic" officeooo:rsid="001c79f3" style:font-style-asian="italic" style:font-style-complex="italic"/>
    </style:style>
    <style:style style:name="T8" style:family="text">
      <style:text-properties fo:font-style="italic" officeooo:rsid="00226522" style:font-style-asian="italic" style:font-style-complex="italic"/>
    </style:style>
    <style:style style:name="T9" style:family="text">
      <style:text-properties fo:font-style="italic" officeooo:rsid="0043874b" style:font-style-asian="italic" style:font-style-complex="italic"/>
    </style:style>
    <style:style style:name="T10" style:family="text">
      <style:text-properties fo:font-style="italic" fo:font-weight="normal" style:font-style-asian="italic" style:font-style-complex="italic"/>
    </style:style>
    <style:style style:name="T11" style:family="text">
      <style:text-properties fo:font-style="italic" fo:font-weight="normal" officeooo:rsid="003e57f3" style:font-style-asian="italic" style:font-style-complex="italic"/>
    </style:style>
    <style:style style:name="T12" style:family="text">
      <style:text-properties fo:font-style="italic" fo:font-weight="normal" officeooo:rsid="0041ab18" style:font-style-asian="italic" style:font-style-complex="italic"/>
    </style:style>
    <style:style style:name="T13" style:family="text">
      <style:text-properties fo:font-style="italic" fo:font-weight="normal" officeooo:rsid="00460240" style:font-style-asian="italic" style:font-style-complex="italic"/>
    </style:style>
    <style:style style:name="T14" style:family="text">
      <style:text-properties fo:font-size="10pt" style:font-size-asian="10pt" style:font-size-complex="10pt"/>
    </style:style>
    <style:style style:name="T15" style:family="text">
      <style:text-properties fo:font-size="10pt" officeooo:rsid="0008effe" style:font-size-asian="10pt" style:font-size-complex="10pt"/>
    </style:style>
    <style:style style:name="T16" style:family="text">
      <style:text-properties fo:font-size="10pt" officeooo:rsid="00158149" style:font-size-asian="10pt" style:font-size-complex="10pt"/>
    </style:style>
    <style:style style:name="T17" style:family="text">
      <style:text-properties fo:font-size="10pt" officeooo:rsid="0016c9f9" style:font-size-asian="10pt" style:font-size-complex="10pt"/>
    </style:style>
    <style:style style:name="T18" style:family="text">
      <style:text-properties fo:font-size="10pt" fo:font-style="italic" style:font-size-asian="10pt" style:font-size-complex="10pt"/>
    </style:style>
    <style:style style:name="T19" style:family="text">
      <style:text-properties fo:font-size="10pt" fo:font-style="italic" officeooo:rsid="0008effe" style:font-size-asian="10pt" style:font-style-asian="italic" style:font-size-complex="10pt" style:font-style-complex="italic"/>
    </style:style>
    <style:style style:name="T20" style:family="text">
      <style:text-properties fo:font-size="10pt" fo:font-weight="bold" style:font-size-asian="10pt" style:font-size-complex="10pt"/>
    </style:style>
    <style:style style:name="T21" style:family="text">
      <style:text-properties fo:font-size="10pt" fo:language="it" fo:country="IT" officeooo:rsid="003d3a30" style:font-size-asian="10pt" style:font-size-complex="10pt"/>
    </style:style>
    <style:style style:name="T22" style:family="text">
      <style:text-properties officeooo:rsid="000b6cdc"/>
    </style:style>
    <style:style style:name="T23" style:family="text">
      <style:text-properties officeooo:rsid="000e839d"/>
    </style:style>
    <style:style style:name="T24" style:family="text">
      <style:text-properties officeooo:rsid="00106930"/>
    </style:style>
    <style:style style:name="T25" style:family="text">
      <style:text-properties officeooo:rsid="00111105"/>
    </style:style>
    <style:style style:name="T26" style:family="text">
      <style:text-properties style:font-name="Liberation Serif" fo:font-style="italic" style:font-style-asian="italic" style:font-style-complex="italic"/>
    </style:style>
    <style:style style:name="T27" style:family="text">
      <style:text-properties style:font-name="Liberation Serif" fo:font-style="italic" officeooo:rsid="00111105" style:font-style-asian="italic" style:font-style-complex="italic"/>
    </style:style>
    <style:style style:name="T28" style:family="text">
      <style:text-properties style:font-name="Liberation Serif" fo:font-style="italic" officeooo:rsid="00186ce3" style:font-style-asian="italic" style:font-style-complex="italic"/>
    </style:style>
    <style:style style:name="T29" style:family="text">
      <style:text-properties style:font-name="Liberation Serif" fo:font-style="italic" officeooo:rsid="002d0458" style:font-style-asian="italic" style:font-style-complex="italic"/>
    </style:style>
    <style:style style:name="T30" style:family="text">
      <style:text-properties style:font-name="Liberation Serif" fo:font-style="italic" officeooo:rsid="0033fa03" style:font-style-asian="italic" style:font-style-complex="italic"/>
    </style:style>
    <style:style style:name="T31" style:family="text">
      <style:text-properties style:font-name="Liberation Serif" fo:font-style="italic" style:font-name-asian="Liberation Serif" style:font-style-asian="italic" style:font-name-complex="Liberation Serif" style:font-style-complex="italic"/>
    </style:style>
    <style:style style:name="T32" style:family="text">
      <style:text-properties style:font-name="Liberation Serif" fo:font-style="italic" officeooo:rsid="0020271b" style:font-name-asian="Liberation Serif" style:font-style-asian="italic" style:font-name-complex="Liberation Serif" style:font-style-complex="italic"/>
    </style:style>
    <style:style style:name="T33" style:family="text">
      <style:text-properties style:font-name="Liberation Serif" fo:font-style="italic" officeooo:rsid="0022f07d" style:font-name-asian="Liberation Serif" style:font-style-asian="italic" style:font-name-complex="Liberation Serif" style:font-style-complex="italic"/>
    </style:style>
    <style:style style:name="T34" style:family="text">
      <style:text-properties style:font-name="Liberation Serif" fo:font-style="italic" style:text-underline-style="none" officeooo:rsid="00362ae4" style:font-style-asian="italic" style:font-style-complex="italic"/>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11b4de" style:font-style-asian="normal" style:font-style-complex="normal"/>
    </style:style>
    <style:style style:name="T37" style:family="text">
      <style:text-properties style:font-name="Liberation Serif" fo:font-style="normal" officeooo:rsid="0013a5b3" style:font-style-asian="normal" style:font-style-complex="normal"/>
    </style:style>
    <style:style style:name="T38" style:family="text">
      <style:text-properties style:font-name="Liberation Serif" fo:font-style="normal" officeooo:rsid="0013b10a" style:font-style-asian="normal" style:font-style-complex="normal"/>
    </style:style>
    <style:style style:name="T39" style:family="text">
      <style:text-properties style:font-name="Liberation Serif" fo:font-style="normal" officeooo:rsid="00158149" style:font-style-asian="normal" style:font-style-complex="normal"/>
    </style:style>
    <style:style style:name="T40" style:family="text">
      <style:text-properties style:font-name="Liberation Serif" fo:font-style="normal" officeooo:rsid="00111105" style:font-style-asian="normal" style:font-style-complex="normal"/>
    </style:style>
    <style:style style:name="T41" style:family="text">
      <style:text-properties style:font-name="Liberation Serif" fo:font-style="normal" officeooo:rsid="0059661c" style:font-style-asian="normal" style:font-style-complex="normal"/>
    </style:style>
    <style:style style:name="T42" style:family="text">
      <style:text-properties style:font-name="Liberation Serif" fo:font-style="normal" officeooo:rsid="005b1442" style:font-style-asian="normal" style:font-style-complex="normal"/>
    </style:style>
    <style:style style:name="T43" style:family="text">
      <style:text-properties style:font-name="Liberation Serif" fo:font-style="normal" officeooo:rsid="0033fa03" style:font-style-asian="normal" style:font-style-complex="normal"/>
    </style:style>
    <style:style style:name="T44" style:family="text">
      <style:text-properties style:font-name="Liberation Serif" fo:font-style="normal" officeooo:rsid="0034dea2" style:font-style-asian="normal" style:font-style-complex="normal"/>
    </style:style>
    <style:style style:name="T45" style:family="text">
      <style:text-properties style:font-name="Liberation Serif" fo:font-style="normal" officeooo:rsid="00362ae4" style:font-style-asian="normal" style:font-style-complex="normal"/>
    </style:style>
    <style:style style:name="T46" style:family="text">
      <style:text-properties style:font-name="Liberation Serif" fo:font-style="normal" officeooo:rsid="00226522" style:font-name-asian="Liberation Serif" style:font-style-asian="normal" style:font-name-complex="Liberation Serif" style:font-style-complex="normal"/>
    </style:style>
    <style:style style:name="T47" style:family="text">
      <style:text-properties style:font-name="Liberation Serif" fo:font-style="normal" style:text-underline-style="none" officeooo:rsid="00362ae4" style:font-style-asian="normal" style:font-style-complex="normal"/>
    </style:style>
    <style:style style:name="T48" style:family="text">
      <style:text-properties style:font-name="Liberation Serif" style:font-name-asian="Liberation Serif" style:font-name-complex="Liberation Serif"/>
    </style:style>
    <style:style style:name="T49" style:family="text">
      <style:text-properties style:font-name="Liberation Serif" officeooo:rsid="0019d913" style:font-name-asian="Liberation Serif" style:font-name-complex="Liberation Serif"/>
    </style:style>
    <style:style style:name="T50" style:family="text">
      <style:text-properties style:font-name="Liberation Serif" officeooo:rsid="00226522" style:font-name-asian="Liberation Serif" style:font-name-complex="Liberation Serif"/>
    </style:style>
    <style:style style:name="T51" style:family="text">
      <style:text-properties style:font-name="Liberation Serif" officeooo:rsid="0022f07d" style:font-name-asian="Liberation Serif" style:font-name-complex="Liberation Serif"/>
    </style:style>
    <style:style style:name="T52" style:family="text">
      <style:text-properties style:font-name="Liberation Serif" officeooo:rsid="00186ce3" style:font-name-asian="Liberation Serif" style:font-name-complex="Liberation Serif"/>
    </style:style>
    <style:style style:name="T53" style:family="text">
      <style:text-properties style:font-name="Liberation Serif" fo:font-size="12pt" fo:font-weight="normal" officeooo:rsid="00186ce3" style:font-name-asian="Liberation Serif" style:font-size-asian="12pt" style:font-weight-asian="normal" style:font-name-complex="Liberation Serif" style:font-size-complex="12pt" style:font-weight-complex="normal"/>
    </style:style>
    <style:style style:name="T54" style:family="text">
      <style:text-properties style:font-name="Liberation Serif" fo:font-size="12pt" fo:font-style="normal" fo:font-weight="normal" officeooo:rsid="00226522" style:font-name-asian="Liberation Serif" style:font-size-asian="12pt" style:font-style-asian="normal" style:font-weight-asian="normal" style:font-name-complex="Liberation Serif" style:font-size-complex="12pt" style:font-style-complex="normal" style:font-weight-complex="normal"/>
    </style:style>
    <style:style style:name="T55" style:family="text">
      <style:text-properties style:font-name="Liberation Serif" officeooo:rsid="002d0458"/>
    </style:style>
    <style:style style:name="T56" style:family="text">
      <style:text-properties style:font-name="Liberation Serif1"/>
    </style:style>
    <style:style style:name="T57" style:family="text">
      <style:text-properties style:font-name="Liberation Serif1" officeooo:rsid="00186ce3"/>
    </style:style>
    <style:style style:name="T58" style:family="text">
      <style:text-properties style:font-name="Liberation Serif1" fo:font-style="italic" officeooo:rsid="00186ce3" style:font-style-asian="italic" style:font-style-complex="italic"/>
    </style:style>
    <style:style style:name="T59" style:family="text">
      <style:text-properties style:font-name="Liberation Serif1" style:font-name-asian="Noto Serif CJK SC" style:font-name-complex="Lohit Devanagari1"/>
    </style:style>
    <style:style style:name="T60" style:family="text">
      <style:text-properties style:font-name="Liberation Serif1" officeooo:rsid="0019d913"/>
    </style:style>
    <style:style style:name="T61" style:family="text">
      <style:text-properties style:font-name="Liberation Serif1" officeooo:rsid="002a3c5a"/>
    </style:style>
    <style:style style:name="T62" style:family="text">
      <style:text-properties style:font-name="Liberation Serif1" officeooo:rsid="002c3584"/>
    </style:style>
    <style:style style:name="T63" style:family="text">
      <style:text-properties style:font-name="Liberation Serif1" officeooo:rsid="002d0458"/>
    </style:style>
    <style:style style:name="T64" style:family="text">
      <style:text-properties style:font-name="Liberation Serif1" fo:font-size="12pt" fo:font-weight="normal" officeooo:rsid="00186ce3" style:font-size-asian="12pt" style:font-weight-asian="normal" style:font-size-complex="12pt" style:font-weight-complex="normal"/>
    </style:style>
    <style:style style:name="T65" style:family="text">
      <style:text-properties style:font-name="Liberation Serif1" fo:font-size="12pt" fo:font-weight="normal" officeooo:rsid="00186ce3" style:font-name-asian="Noto Serif CJK SC" style:font-size-asian="12pt" style:font-weight-asian="normal" style:font-name-complex="Lohit Devanagari1" style:font-size-complex="12pt" style:font-weight-complex="normal"/>
    </style:style>
    <style:style style:name="T66" style:family="text">
      <style:text-properties style:font-name="Liberation Serif1" fo:font-size="12pt" fo:font-style="italic" fo:font-weight="normal" officeooo:rsid="002d0458" style:font-size-asian="12pt" style:font-style-asian="italic" style:font-weight-asian="normal" style:font-size-complex="12pt" style:font-style-complex="italic" style:font-weight-complex="normal"/>
    </style:style>
    <style:style style:name="T67" style:family="text">
      <style:text-properties style:font-name="Liberation Serif1" fo:font-size="12pt" fo:font-style="normal" fo:font-weight="normal" officeooo:rsid="002d0458" style:font-size-asian="12pt" style:font-style-asian="normal" style:font-weight-asian="normal" style:font-size-complex="12pt" style:font-style-complex="normal" style:font-weight-complex="normal"/>
    </style:style>
    <style:style style:name="T68" style:family="text">
      <style:text-properties style:font-name="Liberation Serif1" officeooo:rsid="006bfe0b"/>
    </style:style>
    <style:style style:name="T69" style:family="text">
      <style:text-properties fo:font-style="normal" officeooo:rsid="0013b10a" style:font-style-asian="normal" style:font-style-complex="normal"/>
    </style:style>
    <style:style style:name="T70" style:family="text">
      <style:text-properties fo:font-style="normal" fo:font-weight="normal" officeooo:rsid="00460240" style:font-style-asian="normal" style:font-style-complex="normal"/>
    </style:style>
    <style:style style:name="T71" style:family="text">
      <style:text-properties style:text-position="super 58%" style:font-name="Liberation Serif" fo:font-style="normal" style:font-name-asian="Liberation Serif" style:font-style-asian="normal" style:font-name-complex="Liberation Serif" style:font-style-complex="normal"/>
    </style:style>
    <style:style style:name="T72" style:family="text">
      <style:text-properties style:text-position="super 58%" style:font-name="Liberation Serif" fo:font-size="12pt" fo:font-style="normal" fo:font-weight="normal" officeooo:rsid="002d0458" style:font-name-asian="Liberation Serif" style:font-size-asian="12pt" style:font-style-asian="normal" style:font-weight-asian="normal" style:font-name-complex="Liberation Serif" style:font-size-complex="12pt" style:font-style-complex="normal" style:font-weight-complex="normal"/>
    </style:style>
    <style:style style:name="T73" style:family="text">
      <style:text-properties style:text-position="super 58%" style:font-name="Liberation Serif" fo:font-size="12pt" fo:font-style="italic" fo:font-weight="normal" style:font-name-asian="Liberation Serif" style:font-size-asian="12pt" style:font-style-asian="italic" style:font-weight-asian="normal" style:font-name-complex="Liberation Serif" style:font-size-complex="12pt" style:font-style-complex="italic" style:font-weight-complex="normal"/>
    </style:style>
    <style:style style:name="T74" style:family="text">
      <style:text-properties style:text-position="super 58%" style:font-name="Liberation Serif" fo:font-size="12pt" fo:font-style="italic" fo:font-weight="normal" officeooo:rsid="003ba0f3" style:font-name-asian="Liberation Serif" style:font-size-asian="12pt" style:font-style-asian="italic" style:font-weight-asian="normal" style:font-name-complex="Liberation Serif" style:font-size-complex="12pt" style:font-style-complex="italic" style:font-weight-complex="normal"/>
    </style:style>
    <style:style style:name="T75" style:family="text">
      <style:text-properties style:text-position="super 58%" style:font-name="Liberation Serif" fo:font-style="italic" fo:font-weight="normal" style:font-style-asian="italic" style:font-style-complex="italic"/>
    </style:style>
    <style:style style:name="T76" style:family="text">
      <style:text-properties style:text-position="super 58%" fo:font-style="italic" style:font-style-asian="italic" style:font-style-complex="italic"/>
    </style:style>
    <style:style style:name="T77" style:family="text">
      <style:text-properties style:text-position="super 58%" style:font-name="Liberation Serif1" fo:font-style="italic" fo:font-weight="normal" officeooo:rsid="0067abbd" style:font-style-asian="italic" style:font-style-complex="italic"/>
    </style:style>
    <style:style style:name="T78" style:family="text">
      <style:text-properties style:text-position="super 58%" officeooo:rsid="006e8863"/>
    </style:style>
    <style:style style:name="T79" style:family="text">
      <style:text-properties style:text-position="0% 100%"/>
    </style:style>
    <style:style style:name="T80" style:family="text">
      <style:text-properties style:text-position="0% 100%" officeooo:rsid="0019d913"/>
    </style:style>
    <style:style style:name="T81" style:family="text">
      <style:text-properties style:text-position="0% 100%" style:font-name="Liberation Serif1"/>
    </style:style>
    <style:style style:name="T82" style:family="text">
      <style:text-properties style:text-position="0% 100%" style:font-name="Liberation Serif1" officeooo:rsid="0019d913"/>
    </style:style>
    <style:style style:name="T83" style:family="text">
      <style:text-properties style:text-position="0% 100%" style:font-name="Liberation Serif1" officeooo:rsid="001dcd8b"/>
    </style:style>
    <style:style style:name="T84" style:family="text">
      <style:text-properties style:text-position="0% 100%" style:font-name="Liberation Serif1" fo:font-style="italic" style:font-style-asian="italic" style:font-style-complex="italic"/>
    </style:style>
    <style:style style:name="T85" style:family="text">
      <style:text-properties style:text-position="0% 100%" style:font-name="Liberation Serif1" fo:font-style="italic" officeooo:rsid="001ea2fb" style:font-style-asian="italic" style:font-style-complex="italic"/>
    </style:style>
    <style:style style:name="T86" style:family="text">
      <style:text-properties style:text-position="0% 100%" style:font-name="Liberation Serif1" fo:font-style="italic" officeooo:rsid="002a3c5a" style:font-style-asian="italic" style:font-style-complex="italic"/>
    </style:style>
    <style:style style:name="T87" style:family="text">
      <style:text-properties style:text-position="0% 100%" style:font-name="Liberation Serif1" fo:font-style="italic" officeooo:rsid="0044ddc4" style:font-style-asian="italic" style:font-style-complex="italic"/>
    </style:style>
    <style:style style:name="T88" style:family="text">
      <style:text-properties style:text-position="0% 100%" style:font-name="Liberation Serif1" fo:font-style="italic" officeooo:rsid="004cbde5" style:font-style-asian="italic" style:font-style-complex="italic"/>
    </style:style>
    <style:style style:name="T89" style:family="text">
      <style:text-properties style:text-position="0% 100%" style:font-name="Liberation Serif1" fo:font-style="italic" officeooo:rsid="0019d913" style:font-style-asian="italic" style:font-style-complex="italic"/>
    </style:style>
    <style:style style:name="T90" style:family="text">
      <style:text-properties style:text-position="0% 100%" style:font-name="Liberation Serif1" fo:font-style="italic" officeooo:rsid="005436e0" style:font-style-asian="italic" style:font-style-complex="italic"/>
    </style:style>
    <style:style style:name="T91" style:family="text">
      <style:text-properties style:text-position="0% 100%" style:font-name="Liberation Serif1" fo:font-style="italic" officeooo:rsid="0067abbd" style:font-style-asian="italic" style:font-style-complex="italic"/>
    </style:style>
    <style:style style:name="T92" style:family="text">
      <style:text-properties style:text-position="0% 100%" style:font-name="Liberation Serif1" fo:font-style="italic" fo:font-weight="normal" style:font-style-asian="italic" style:font-style-complex="italic"/>
    </style:style>
    <style:style style:name="T93" style:family="text">
      <style:text-properties style:text-position="0% 100%" style:font-name="Liberation Serif1" fo:font-style="italic" fo:font-weight="normal" officeooo:rsid="0042b8ad" style:font-style-asian="italic" style:font-style-complex="italic"/>
    </style:style>
    <style:style style:name="T94" style:family="text">
      <style:text-properties style:text-position="0% 100%" style:font-name="Liberation Serif1" fo:font-style="italic" fo:font-weight="normal" officeooo:rsid="0044ddc4" style:font-style-asian="italic" style:font-style-complex="italic"/>
    </style:style>
    <style:style style:name="T95" style:family="text">
      <style:text-properties style:text-position="0% 100%" style:font-name="Liberation Serif1" fo:font-style="italic" fo:font-weight="normal" officeooo:rsid="0067abbd" style:font-style-asian="italic" style:font-style-complex="italic"/>
    </style:style>
    <style:style style:name="T96" style:family="text">
      <style:text-properties style:text-position="0% 100%" style:font-name="Liberation Serif1" officeooo:rsid="001c79f3"/>
    </style:style>
    <style:style style:name="T97" style:family="text">
      <style:text-properties style:text-position="0% 100%" style:font-name="Liberation Serif1" fo:font-style="normal" style:text-underline-style="none" style:font-style-asian="normal" style:font-style-complex="normal"/>
    </style:style>
    <style:style style:name="T98" style:family="text">
      <style:text-properties style:text-position="0% 100%" style:font-name="Liberation Serif1" fo:font-style="normal" style:font-style-asian="normal" style:font-style-complex="normal"/>
    </style:style>
    <style:style style:name="T99" style:family="text">
      <style:text-properties style:text-position="0% 100%" style:font-name="Liberation Serif1" fo:font-style="normal" officeooo:rsid="0044ddc4" style:font-style-asian="normal" style:font-style-complex="normal"/>
    </style:style>
    <style:style style:name="T100" style:family="text">
      <style:text-properties style:text-position="0% 100%" style:font-name="Liberation Serif1" fo:font-style="normal" officeooo:rsid="00460240" style:font-style-asian="normal" style:font-style-complex="normal"/>
    </style:style>
    <style:style style:name="T101" style:family="text">
      <style:text-properties style:text-position="0% 100%" style:font-name="Liberation Serif1" fo:font-style="normal" officeooo:rsid="004b2287" style:font-style-asian="normal" style:font-style-complex="normal"/>
    </style:style>
    <style:style style:name="T102" style:family="text">
      <style:text-properties style:text-position="0% 100%" style:font-name="Liberation Serif1" fo:font-style="normal" officeooo:rsid="004cbde5" style:font-style-asian="normal" style:font-style-complex="normal"/>
    </style:style>
    <style:style style:name="T103" style:family="text">
      <style:text-properties style:text-position="0% 100%" style:font-name="Liberation Serif1" fo:font-style="normal" fo:font-weight="normal" style:font-style-asian="normal" style:font-style-complex="normal"/>
    </style:style>
    <style:style style:name="T104" style:family="text">
      <style:text-properties style:text-position="0% 100%" style:font-name="Liberation Serif1" fo:font-style="normal" fo:font-weight="normal" officeooo:rsid="0042b8ad" style:font-style-asian="normal" style:font-style-complex="normal"/>
    </style:style>
    <style:style style:name="T105" style:family="text">
      <style:text-properties style:text-position="0% 100%" style:font-name="Liberation Serif1" fo:font-style="normal" fo:font-weight="normal" officeooo:rsid="0044ddc4" style:font-style-asian="normal" style:font-style-complex="normal"/>
    </style:style>
    <style:style style:name="T106" style:family="text">
      <style:text-properties style:text-position="0% 100%" style:font-name="Liberation Serif1" fo:font-style="normal" fo:font-weight="normal" officeooo:rsid="00460240" style:font-style-asian="normal" style:font-style-complex="normal"/>
    </style:style>
    <style:style style:name="T107" style:family="text">
      <style:text-properties style:text-position="0% 100%" style:font-name="Liberation Serif1" fo:font-style="normal" fo:font-weight="normal" officeooo:rsid="004e44d0" style:font-style-asian="normal" style:font-style-complex="normal"/>
    </style:style>
    <style:style style:name="T108" style:family="text">
      <style:text-properties style:text-position="0% 100%" style:font-name="Liberation Serif1" fo:font-style="normal" fo:font-weight="normal" officeooo:rsid="00509ced" style:font-style-asian="normal" style:font-style-complex="normal"/>
    </style:style>
    <style:style style:name="T109" style:family="text">
      <style:text-properties style:text-position="0% 100%" style:font-name="Liberation Serif1" fo:font-style="normal" fo:font-weight="normal" officeooo:rsid="0067abbd" style:font-style-asian="normal" style:font-style-complex="normal"/>
    </style:style>
    <style:style style:name="T110" style:family="text">
      <style:text-properties style:text-position="0% 100%" style:font-name="Liberation Serif1" officeooo:rsid="001ea2fb"/>
    </style:style>
    <style:style style:name="T111" style:family="text">
      <style:text-properties style:text-position="0% 100%" style:font-name="Liberation Serif1" officeooo:rsid="002a3c5a"/>
    </style:style>
    <style:style style:name="T112" style:family="text">
      <style:text-properties style:text-position="0% 100%" style:font-name="Liberation Serif1" officeooo:rsid="002c3584"/>
    </style:style>
    <style:style style:name="T113" style:family="text">
      <style:text-properties style:text-position="0% 100%" style:font-name="Liberation Serif1"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114" style:family="text">
      <style:text-properties style:text-position="0% 100%" style:font-name="Liberation Serif1" fo:font-size="12pt" fo:font-style="normal" fo:font-weight="normal" officeooo:rsid="00186ce3" style:font-name-asian="Liberation Serif" style:font-size-asian="12pt" style:font-style-asian="normal" style:font-weight-asian="normal" style:font-name-complex="Liberation Serif" style:font-size-complex="12pt" style:font-style-complex="normal" style:font-weight-complex="normal"/>
    </style:style>
    <style:style style:name="T115" style:family="text">
      <style:text-properties style:text-position="0% 100%" style:font-name="Liberation Serif1" fo:font-size="12pt" fo:font-style="normal" fo:font-weight="normal" officeooo:rsid="002e3b9e" style:font-name-asian="Liberation Serif" style:font-size-asian="12pt" style:font-style-asian="normal" style:font-weight-asian="normal" style:font-name-complex="Liberation Serif" style:font-size-complex="12pt" style:font-style-complex="normal" style:font-weight-complex="normal"/>
    </style:style>
    <style:style style:name="T116" style:family="text">
      <style:text-properties style:text-position="0% 100%" style:font-name="Liberation Serif1" fo:font-size="12pt" fo:font-style="normal" fo:font-weight="normal" officeooo:rsid="00186ce3" style:font-name-asian="Noto Serif CJK SC" style:font-size-asian="12pt" style:font-style-asian="normal" style:font-weight-asian="normal" style:font-name-complex="Lohit Devanagari1" style:font-size-complex="12pt" style:font-style-complex="normal" style:font-weight-complex="normal"/>
    </style:style>
    <style:style style:name="T117" style:family="text">
      <style:text-properties style:text-position="0% 100%" style:font-name="Liberation Serif1" fo:font-size="12pt" fo:font-style="italic" fo:font-weight="normal" officeooo:rsid="002e3b9e" style:font-name-asian="Liberation Serif" style:font-size-asian="12pt" style:font-style-asian="italic" style:font-weight-asian="normal" style:font-name-complex="Liberation Serif" style:font-size-complex="12pt" style:font-style-complex="italic" style:font-weight-complex="normal"/>
    </style:style>
    <style:style style:name="T118" style:family="text">
      <style:text-properties style:text-position="0% 100%" style:font-name="Liberation Serif1" officeooo:rsid="005436e0"/>
    </style:style>
    <style:style style:name="T119" style:family="text">
      <style:text-properties style:text-position="0% 100%" style:font-name="Liberation Serif1" officeooo:rsid="0065db89"/>
    </style:style>
    <style:style style:name="T120" style:family="text">
      <style:text-properties style:text-position="0% 100%" style:font-name="Liberation Serif1" officeooo:rsid="0067abbd"/>
    </style:style>
    <style:style style:name="T121" style:family="text">
      <style:text-properties style:text-position="0% 100%" style:font-name="Liberation Serif" style:font-name-asian="Liberation Serif" style:font-name-complex="Liberation Serif"/>
    </style:style>
    <style:style style:name="T122" style:family="text">
      <style:text-properties style:text-position="0% 100%" style:font-name="Liberation Serif" officeooo:rsid="0022f07d" style:font-name-asian="Liberation Serif" style:font-name-complex="Liberation Serif"/>
    </style:style>
    <style:style style:name="T123" style:family="text">
      <style:text-properties style:text-position="0% 100%" style:font-name="Liberation Serif" officeooo:rsid="0020271b" style:font-name-asian="Liberation Serif" style:font-name-complex="Liberation Serif"/>
    </style:style>
    <style:style style:name="T124" style:family="text">
      <style:text-properties style:text-position="0% 100%" style:font-name="Liberation Serif" officeooo:rsid="00186ce3" style:font-name-asian="Liberation Serif" style:font-name-complex="Liberation Serif"/>
    </style:style>
    <style:style style:name="T125" style:family="text">
      <style:text-properties style:text-position="0% 100%" style:font-name="Liberation Serif" officeooo:rsid="00269970" style:font-name-asian="Liberation Serif" style:font-name-complex="Liberation Serif"/>
    </style:style>
    <style:style style:name="T126" style:family="text">
      <style:text-properties style:text-position="0% 100%" style:font-name="Liberation Serif" officeooo:rsid="00287098" style:font-name-asian="Liberation Serif" style:font-name-complex="Liberation Serif"/>
    </style:style>
    <style:style style:name="T127" style:family="text">
      <style:text-properties style:text-position="0% 100%" style:font-name="Liberation Serif" fo:font-style="italic" style:font-name-asian="Liberation Serif" style:font-style-asian="italic" style:font-name-complex="Liberation Serif" style:font-style-complex="italic"/>
    </style:style>
    <style:style style:name="T128" style:family="text">
      <style:text-properties style:text-position="0% 100%" style:font-name="Liberation Serif" fo:font-style="italic" officeooo:rsid="0020271b" style:font-name-asian="Liberation Serif" style:font-style-asian="italic" style:font-name-complex="Liberation Serif" style:font-style-complex="italic"/>
    </style:style>
    <style:style style:name="T129" style:family="text">
      <style:text-properties style:text-position="0% 100%" style:font-name="Liberation Serif" fo:font-style="italic" officeooo:rsid="0022f07d" style:font-name-asian="Liberation Serif" style:font-style-asian="italic" style:font-name-complex="Liberation Serif" style:font-style-complex="italic"/>
    </style:style>
    <style:style style:name="T130" style:family="text">
      <style:text-properties style:text-position="0% 100%" style:font-name="Liberation Serif" fo:font-style="italic" officeooo:rsid="00287098" style:font-name-asian="Liberation Serif" style:font-style-asian="italic" style:font-name-complex="Liberation Serif" style:font-style-complex="italic"/>
    </style:style>
    <style:style style:name="T131" style:family="text">
      <style:text-properties style:text-position="0% 100%" style:font-name="Liberation Serif" fo:font-style="italic" style:font-style-asian="italic" style:font-style-complex="italic"/>
    </style:style>
    <style:style style:name="T132" style:family="text">
      <style:text-properties style:text-position="0% 100%" style:font-name="Liberation Serif" fo:font-style="italic" officeooo:rsid="0043874b" style:font-style-asian="italic" style:font-style-complex="italic"/>
    </style:style>
    <style:style style:name="T133" style:family="text">
      <style:text-properties style:text-position="0% 100%" style:font-name="Liberation Serif" fo:font-style="italic" officeooo:rsid="00460240" style:font-style-asian="italic" style:font-style-complex="italic"/>
    </style:style>
    <style:style style:name="T134" style:family="text">
      <style:text-properties style:text-position="0% 100%" style:font-name="Liberation Serif" fo:font-style="italic" fo:font-weight="normal" style:font-style-asian="italic" style:font-style-complex="italic"/>
    </style:style>
    <style:style style:name="T135" style:family="text">
      <style:text-properties style:text-position="0% 100%" style:font-name="Liberation Serif" fo:font-style="italic" fo:font-weight="normal" officeooo:rsid="0042b8ad" style:font-style-asian="italic" style:font-style-complex="italic"/>
    </style:style>
    <style:style style:name="T136" style:family="text">
      <style:text-properties style:text-position="0% 100%" style:font-name="Liberation Serif" fo:font-style="normal" style:font-name-asian="Liberation Serif" style:font-style-asian="normal" style:font-name-complex="Liberation Serif" style:font-style-complex="normal"/>
    </style:style>
    <style:style style:name="T137" style:family="text">
      <style:text-properties style:text-position="0% 100%" style:font-name="Liberation Serif" fo:font-style="normal" officeooo:rsid="00287098" style:font-name-asian="Liberation Serif" style:font-style-asian="normal" style:font-name-complex="Liberation Serif" style:font-style-complex="normal"/>
    </style:style>
    <style:style style:name="T138" style:family="text">
      <style:text-properties style:text-position="0% 100%" style:font-name="Liberation Serif" fo:font-style="normal" officeooo:rsid="00186ce3" style:font-name-asian="Liberation Serif" style:font-style-asian="normal" style:font-name-complex="Liberation Serif" style:font-style-complex="normal"/>
    </style:style>
    <style:style style:name="T139" style:family="text">
      <style:text-properties style:text-position="0% 100%" style:font-name="Liberation Serif" fo:font-style="normal" officeooo:rsid="0022f07d" style:font-name-asian="Liberation Serif" style:font-style-asian="normal" style:font-name-complex="Liberation Serif" style:font-style-complex="normal"/>
    </style:style>
    <style:style style:name="T140" style:family="text">
      <style:text-properties style:text-position="0% 100%" style:font-name="Liberation Serif" fo:font-style="normal" fo:font-weight="normal" officeooo:rsid="0044ddc4" style:font-style-asian="normal" style:font-style-complex="normal"/>
    </style:style>
    <style:style style:name="T141" style:family="text">
      <style:text-properties style:text-position="0% 100%" style:font-name="Liberation Serif" fo:font-style="normal" style:font-style-asian="normal" style:font-style-complex="normal"/>
    </style:style>
    <style:style style:name="T142" style:family="text">
      <style:text-properties style:text-position="0% 100%" style:font-name="Liberation Serif" fo:font-style="normal" officeooo:rsid="00460240" style:font-style-asian="normal" style:font-style-complex="normal"/>
    </style:style>
    <style:style style:name="T143" style:family="text">
      <style:text-properties style:text-position="0% 100%"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144" style:family="text">
      <style:text-properties style:text-position="0% 100%" style:font-name="Liberation Serif" fo:font-size="12pt" fo:font-style="normal" fo:font-weight="normal" officeooo:rsid="002d0458" style:font-name-asian="Liberation Serif" style:font-size-asian="12pt" style:font-style-asian="normal" style:font-weight-asian="normal" style:font-name-complex="Liberation Serif" style:font-size-complex="12pt" style:font-style-complex="normal" style:font-weight-complex="normal"/>
    </style:style>
    <style:style style:name="T145" style:family="text">
      <style:text-properties style:text-position="0% 100%" style:font-name="Liberation Serif" fo:font-size="12pt" fo:font-style="normal" fo:font-weight="normal" officeooo:rsid="00186ce3" style:font-name-asian="Liberation Serif" style:font-size-asian="12pt" style:font-style-asian="normal" style:font-weight-asian="normal" style:font-name-complex="Liberation Serif" style:font-size-complex="12pt" style:font-style-complex="normal" style:font-weight-complex="normal"/>
    </style:style>
    <style:style style:name="T146" style:family="text">
      <style:text-properties style:text-position="0% 100%" style:font-name="Liberation Serif" fo:font-size="12pt" fo:font-style="normal" fo:font-weight="normal" officeooo:rsid="002e3b9e" style:font-name-asian="Liberation Serif" style:font-size-asian="12pt" style:font-style-asian="normal" style:font-weight-asian="normal" style:font-name-complex="Liberation Serif" style:font-size-complex="12pt" style:font-style-complex="normal" style:font-weight-complex="normal"/>
    </style:style>
    <style:style style:name="T147" style:family="text">
      <style:text-properties style:text-position="0% 100%" style:font-name="Liberation Serif" fo:font-size="12pt" fo:font-style="normal" fo:font-weight="normal" officeooo:rsid="002eb573" style:font-name-asian="Liberation Serif" style:font-size-asian="12pt" style:font-style-asian="normal" style:font-weight-asian="normal" style:font-name-complex="Liberation Serif" style:font-size-complex="12pt" style:font-style-complex="normal" style:font-weight-complex="normal"/>
    </style:style>
    <style:style style:name="T148" style:family="text">
      <style:text-properties style:text-position="0% 100%" style:font-name="Liberation Serif" fo:font-size="12pt" fo:font-style="normal" fo:font-weight="normal" officeooo:rsid="003ba0f3" style:font-name-asian="Liberation Serif" style:font-size-asian="12pt" style:font-style-asian="normal" style:font-weight-asian="normal" style:font-name-complex="Liberation Serif" style:font-size-complex="12pt" style:font-style-complex="normal" style:font-weight-complex="normal"/>
    </style:style>
    <style:style style:name="T149" style:family="text">
      <style:text-properties style:text-position="0% 100%" style:font-name="Liberation Serif" fo:font-size="12pt" fo:font-style="normal" fo:font-weight="normal" officeooo:rsid="003d3a30" style:font-name-asian="Liberation Serif" style:font-size-asian="12pt" style:font-style-asian="normal" style:font-weight-asian="normal" style:font-name-complex="Liberation Serif" style:font-size-complex="12pt" style:font-style-complex="normal" style:font-weight-complex="normal"/>
    </style:style>
    <style:style style:name="T150" style:family="text">
      <style:text-properties style:text-position="0% 100%" style:font-name="Liberation Serif" fo:font-size="12pt" fo:font-style="italic" fo:font-weight="normal" style:font-name-asian="Liberation Serif" style:font-size-asian="12pt" style:font-style-asian="italic" style:font-weight-asian="normal" style:font-name-complex="Liberation Serif" style:font-size-complex="12pt" style:font-style-complex="italic" style:font-weight-complex="normal"/>
    </style:style>
    <style:style style:name="T151" style:family="text">
      <style:text-properties style:text-position="0% 100%" style:font-name="Liberation Serif" fo:font-size="12pt" fo:font-style="italic" fo:font-weight="normal" officeooo:rsid="002e3b9e" style:font-name-asian="Liberation Serif" style:font-size-asian="12pt" style:font-style-asian="italic" style:font-weight-asian="normal" style:font-name-complex="Liberation Serif" style:font-size-complex="12pt" style:font-style-complex="italic" style:font-weight-complex="normal"/>
    </style:style>
    <style:style style:name="T152" style:family="text">
      <style:text-properties style:text-position="0% 100%" style:font-name="Liberation Serif" fo:font-size="12pt" fo:font-style="italic" fo:font-weight="normal" officeooo:rsid="002eb573" style:font-name-asian="Liberation Serif" style:font-size-asian="12pt" style:font-style-asian="italic" style:font-weight-asian="normal" style:font-name-complex="Liberation Serif" style:font-size-complex="12pt" style:font-style-complex="italic" style:font-weight-complex="normal"/>
    </style:style>
    <style:style style:name="T153" style:family="text">
      <style:text-properties style:text-position="0% 100%" style:font-name="Liberation Serif" fo:font-size="12pt" fo:font-style="italic" fo:font-weight="normal" officeooo:rsid="002d0458" style:font-name-asian="Liberation Serif" style:font-size-asian="12pt" style:font-style-asian="italic" style:font-weight-asian="normal" style:font-name-complex="Liberation Serif" style:font-size-complex="12pt" style:font-style-complex="italic" style:font-weight-complex="normal"/>
    </style:style>
    <style:style style:name="T154" style:family="text">
      <style:text-properties style:text-position="0% 100%" style:font-name="Liberation Serif" fo:font-size="12pt" fo:font-style="italic" fo:font-weight="normal" officeooo:rsid="003ba0f3" style:font-name-asian="Liberation Serif" style:font-size-asian="12pt" style:font-style-asian="italic" style:font-weight-asian="normal" style:font-name-complex="Liberation Serif" style:font-size-complex="12pt" style:font-style-complex="italic" style:font-weight-complex="normal"/>
    </style:style>
    <style:style style:name="T155" style:family="text">
      <style:text-properties style:text-position="0% 100%" fo:font-style="italic" style:font-style-asian="italic" style:font-style-complex="italic"/>
    </style:style>
    <style:style style:name="T156" style:family="text">
      <style:text-properties style:text-position="0% 100%" officeooo:rsid="0022f07d"/>
    </style:style>
    <style:style style:name="T157" style:family="text">
      <style:text-properties style:text-position="0% 100%" fo:font-style="normal" style:font-style-asian="normal" style:font-style-complex="normal"/>
    </style:style>
    <style:style style:name="T158" style:family="text">
      <style:text-properties style:text-position="0% 100%" fo:font-style="normal" officeooo:rsid="0022f07d" style:font-style-asian="normal" style:font-style-complex="normal"/>
    </style:style>
    <style:style style:name="T159" style:family="text">
      <style:text-properties style:text-position="0% 100%" officeooo:rsid="006e8863"/>
    </style:style>
    <style:style style:name="T160" style:family="text">
      <style:text-properties style:text-position="sub 58%" style:font-name="Liberation Serif1" officeooo:rsid="0019d913"/>
    </style:style>
    <style:style style:name="T161" style:family="text">
      <style:text-properties style:text-position="sub 58%" style:font-name="Liberation Serif1" fo:font-style="italic" style:font-style-asian="italic" style:font-style-complex="italic"/>
    </style:style>
    <style:style style:name="T162" style:family="text">
      <style:text-properties style:text-position="sub 58%" style:font-name="Liberation Serif1" fo:font-style="italic" officeooo:rsid="004cbde5" style:font-style-asian="italic" style:font-style-complex="italic"/>
    </style:style>
    <style:style style:name="T163" style:family="text">
      <style:text-properties style:text-position="sub 58%" style:font-name="Liberation Serif1" fo:font-style="italic" officeooo:rsid="0044ddc4" style:font-style-asian="italic" style:font-style-complex="italic"/>
    </style:style>
    <style:style style:name="T164" style:family="text">
      <style:text-properties style:text-position="sub 58%" style:font-name="Liberation Serif1" fo:font-style="italic" fo:font-weight="normal" style:font-style-asian="italic" style:font-style-complex="italic"/>
    </style:style>
    <style:style style:name="T165" style:family="text">
      <style:text-properties style:text-position="sub 58%" style:font-name="Liberation Serif1" fo:font-style="italic" fo:font-weight="normal" officeooo:rsid="0042b8ad" style:font-style-asian="italic" style:font-style-complex="italic"/>
    </style:style>
    <style:style style:name="T166" style:family="text">
      <style:text-properties style:text-position="sub 58%" style:font-name="Liberation Serif" fo:font-style="italic" officeooo:rsid="00460240" style:font-style-asian="italic" style:font-style-complex="italic"/>
    </style:style>
    <style:style style:name="T167" style:family="text">
      <style:text-properties officeooo:rsid="001a18fd"/>
    </style:style>
    <style:style style:name="T168" style:family="text">
      <style:text-properties officeooo:rsid="001c79f3"/>
    </style:style>
    <style:style style:name="T169" style:family="text">
      <style:text-properties officeooo:rsid="001dcd8b"/>
    </style:style>
    <style:style style:name="T170" style:family="text">
      <style:text-properties officeooo:rsid="0020271b"/>
    </style:style>
    <style:style style:name="T171" style:family="text">
      <style:text-properties officeooo:rsid="00226522"/>
    </style:style>
    <style:style style:name="T172" style:family="text">
      <style:text-properties officeooo:rsid="0024cbfb"/>
    </style:style>
    <style:style style:name="T173" style:family="text">
      <style:text-properties officeooo:rsid="00269970"/>
    </style:style>
    <style:style style:name="T174" style:family="text">
      <style:text-properties officeooo:rsid="00287098"/>
    </style:style>
    <style:style style:name="T175" style:family="text">
      <style:text-properties officeooo:rsid="002a3c5a"/>
    </style:style>
    <style:style style:name="T176" style:family="text">
      <style:text-properties officeooo:rsid="002c3584"/>
    </style:style>
    <style:style style:name="T177" style:family="text">
      <style:text-properties officeooo:rsid="002d0458"/>
    </style:style>
    <style:style style:name="T178" style:family="text">
      <style:text-properties fo:font-weight="normal"/>
    </style:style>
    <style:style style:name="T179" style:family="text">
      <style:text-properties fo:font-weight="normal" officeooo:rsid="003fd998"/>
    </style:style>
    <style:style style:name="T180" style:family="text">
      <style:text-properties fo:font-weight="normal" officeooo:rsid="002c3584"/>
    </style:style>
    <style:style style:name="T181" style:family="text">
      <style:text-properties fo:font-weight="normal" officeooo:rsid="0041ab18"/>
    </style:style>
    <style:style style:name="T182" style:family="text">
      <style:text-properties fo:font-weight="normal" officeooo:rsid="002c3584" style:font-weight-asian="normal" style:font-weight-complex="normal"/>
    </style:style>
    <style:style style:name="T183" style:family="text">
      <style:text-properties fo:font-weight="normal" officeooo:rsid="00460240"/>
    </style:style>
    <style:style style:name="T184" style:family="text">
      <style:text-properties officeooo:rsid="0033e2bd"/>
    </style:style>
    <style:style style:name="T185" style:family="text">
      <style:text-properties officeooo:rsid="0033fa03"/>
    </style:style>
    <style:style style:name="T186" style:family="text">
      <style:text-properties officeooo:rsid="003896ef"/>
    </style:style>
    <style:style style:name="T187" style:family="text">
      <style:text-properties officeooo:rsid="003d3a30"/>
    </style:style>
    <style:style style:name="T188" style:family="text">
      <style:text-properties officeooo:rsid="003e57f3"/>
    </style:style>
    <style:style style:name="T189" style:family="text">
      <style:text-properties officeooo:rsid="0043874b"/>
    </style:style>
    <style:style style:name="T190" style:family="text">
      <style:text-properties officeooo:rsid="0044ddc4"/>
    </style:style>
    <style:style style:name="T191" style:family="text">
      <style:text-properties officeooo:rsid="0057696b"/>
    </style:style>
    <style:style style:name="T192" style:family="text">
      <style:text-properties officeooo:rsid="005cfe74"/>
    </style:style>
    <style:style style:name="T193" style:family="text">
      <style:text-properties officeooo:rsid="005fa166"/>
    </style:style>
    <style:style style:name="T194" style:family="text">
      <style:text-properties officeooo:rsid="0068c260"/>
    </style:style>
    <style:style style:name="T195" style:family="text">
      <style:text-properties officeooo:rsid="0069da99"/>
    </style:style>
    <style:style style:name="T196" style:family="text">
      <style:text-properties officeooo:rsid="006b2b9b"/>
    </style:style>
    <style:style style:name="T197" style:family="text">
      <style:text-properties fo:font-weight="bold" style:font-weight-asian="bold" style:font-weight-complex="bold"/>
    </style:style>
    <style:style style:name="T198" style:family="text">
      <style:text-properties officeooo:rsid="006bfe0b"/>
    </style:style>
    <style:style style:name="T199" style:family="text">
      <style:text-properties style:font-name="Liberation Serif" officeooo:rsid="006bfe0b"/>
    </style:style>
    <style:style style:name="T200" style:family="text">
      <style:text-properties style:font-name="Liberation Serif" fo:font-style="italic" officeooo:rsid="006bfe0b" style:font-style-asian="italic" style:font-style-complex="italic"/>
    </style:style>
    <style:style style:name="T201" style:family="text">
      <style:text-properties officeooo:rsid="006d7d26"/>
    </style:style>
    <style:style style:name="T202" style:family="text">
      <style:text-properties officeooo:rsid="006e8863"/>
    </style:style>
    <style:style style:name="T203" style:family="text">
      <style:text-properties officeooo:rsid="006f72e3"/>
    </style:style>
    <style:style style:name="T204" style:family="text">
      <style:text-properties officeooo:rsid="00709dab"/>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fals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1" text:outline-level="2"><text:bookmark text:name="h.kvcdr2afmpk"/>SVM &amp; Logistic Regression for Wine-Quality Prediction</text:h>
      <text:p text:style-name="P3"><text:tab/></text:p>
      <text:p text:style-name="P3"><text:span text:style-name="T2">P</text:span><text:span text:style-name="T1">roject for the course Statistical </text:span><text:span text:style-name="T2">M</text:span><text:span text:style-name="T1">ethod</text:span><text:span text:style-name="T2">s</text:span><text:span text:style-name="T1"> for Machine Learning at Univerità degli Studi di Milano</text:span></text:p>
      <text:p text:style-name="P2"/>
      <text:p text:style-name="P2"/>
      <text:p text:style-name="P74">Author: Daniele Monti</text:p>
      <text:p text:style-name="P2"/>
      <text:p text:style-name="P2"/>
      <text:p text:style-name="P4">I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are grave and serious offences in the university and accept the penalties that would be imposed should I engage in plagiarism, collusion or copying. This assignment, or any part of it, has not been previously submitted by me or any other person for assessment on this or any other course of study.</text:p>
      <text:p text:style-name="P4"/>
      <text:p text:style-name="P4"/>
      <text:p text:style-name="P2"/>
      <text:p text:style-name="P35">Environment</text:p>
      <text:p text:style-name="P13">The project uses a tool called uv to manage Python packages. Instructions on how to install this software can be found at <text:a xlink:type="simple" xlink:href="https://docs.astral.sh/uv/getting-started/installation/" text:style-name="Internet_20_link" text:visited-style-name="Visited_20_Internet_20_Link">https://docs.astral.sh/uv/getting-started/installation/</text:a>.</text:p>
      <text:p text:style-name="P15">Once uv is installed, the environment can be reproduced by following these simple steps:</text:p>
      <text:list xml:id="list1333243499" text:style-name="L1">
        <text:list-item>
          <text:p text:style-name="P95">navigate to the project’s folder</text:p>
        </text:list-item>
        <text:list-item>
          <text:p text:style-name="P95">run the command “uv sync”</text:p>
        </text:list-item>
        <text:list-item>
          <text:p text:style-name="P95">activate the python virtual environment situated in the folder .venv</text:p>
        </text:list-item>
      </text:list>
      <text:p text:style-name="P15">To execute a python script, use the command “uv run script_name.py”.</text:p>
      <text:p text:style-name="P97">All charts and plots for exploratory data analysis and model evaluation can be recovered by running <text:s/>the corresponding jupyter notebook.</text:p>
      <text:p text:style-name="P14"/>
      <text:p text:style-name="P14"/>
      <text:p text:style-name="P14"/>
      <text:p text:style-name="P36">Exploratory Data Analysis</text:p>
      <text:p text:style-name="P4">Exploratory data analysis <text:span text:style-name="T3">was conducted within the jupyter notebook ‘data_analysis.ipynb’. There are 11 features, and the dataset contains a total of 6497 records, none of which contains a null value; missing data treatment is therefore unnecessary.</text:span></text:p>
      <text:p text:style-name="P4"/>
      <text:p text:style-name="P5"><text:span text:style-name="T3">The quality has been transformed into a binary class as per instructions: quality greater or equal to 6 corresponds to the positive class, identified by the value 1, quality less than 6 corresponds to the negative class, identified by the value -1. The two classes thus formed are somewhat imbalanced, with the positive class comprising the 63.31% of the total and the negative comprising of the 36.69%. </text:span><text:span text:style-name="T4">This issue will be addressed in the section on preprocessing.</text:span></text:p>
      <text:p text:style-name="P5"/>
      <text:p text:style-name="P6"><text:span text:style-name="T4">There are 993 records which are present more than once, and a handful which appear as high as 8 or 7 times. This is not a result of the transformation of the quality into a binary class, as the same counts apply also for the non-transformed dataset. </text:span>According to the research paper <text:span text:style-name="T4">[1]</text:span> by the original creators of the dataset:</text:p>
      <text:p text:style-name="P42"><text:soft-page-break/><text:s/>“The data were recorded by a computerized system (iLab), which automatically manages the process of wine sample testing from producer requests to laboratory and sensory analysis. Each entry denotes a given test (analytical or sensory) [...]”</text:p>
      <text:p text:style-name="Standard">They also say:</text:p>
      <text:p text:style-name="P42">“During the preprocessing stage, the database was transformed in order to include a distinct wine sample (with all tests) per row.”,</text:p>
      <text:p text:style-name="Standard"/>
      <text:p text:style-name="P8">which leads me to the conclusion that rows with the exact same feature values corresponds to different taste tests rather than to different wines samples that happen to have the same feature values. If this is the case, it is surprising that in all of such cases, each taste test resulted in the same quality evaluation from the experts, but since the original authors decided to use the dataset without dropping the duplicated rows, I will do the same.</text:p>
      <text:p text:style-name="P75">There is also an argument to be made that keeping the duplicated records better represents the underlying unknown distribution of the data, so dropping the records would be detrimental. At the same time, it is quite possible that some records seen during training will also be seen during testing, which is not desirable. This could be avoided by assigning a weight to each record proportional to the number of times it appears in the dataset and then eliminating the duplicates, but I did not want to overcomplicate the project.</text:p>
      <text:p text:style-name="P5"/>
      <text:p text:style-name="P9"><text:span text:style-name="T22">Univariate distribution analysis shows that all of the features are approximately normally distributed, with </text:span><text:span text:style-name="T25">several</text:span><text:span text:style-name="T22"> having a light skew (e.g. ‘volatile acidity’, ‘residual sugar’, ‘</text:span><text:span text:style-name="T23">alcohol’</text:span><text:span text:style-name="T22">). </text:span><text:span text:style-name="T23">Some features, namely ‘free sulfur dioxide’, ‘</text:span>volatile acidity’, ‘citric acid’, ‘residual sugar’, ‘chlorides’, ‘total sulfur dioxide’ <text:span text:style-name="T23">and ‘</text:span>density’ <text:span text:style-name="T23">present several extreme outliers, for a total of 14 records affected. </text:span><text:span text:style-name="T24">All the other features present a few (as is the case for ‘alcohol’ or ‘total sulfur dioxide’) or many milder outliers (as in the case of all the remaining features). E</text:span><text:span text:style-name="T23">xtreme outliers have been treated the same as every other during the preprocessing stage, though maybe it would be beneficial to outright remove them from the dataset.</text:span></text:p>
      <text:p text:style-name="P7"/>
      <text:p text:style-name="P45">Bivariate analysis shows that there are no extremely strong linear correlations between features, and there are only two cases where there is a relatively strong linear correlation, which are, unsurprisingly:</text:p>
      <text:list xml:id="list3287867595" text:style-name="L2">
        <text:list-item>
          <text:p text:style-name="P111">positive, between ‘total sulfur dioxide’ and ‘free sulfur dioxide’</text:p>
        </text:list-item>
        <text:list-item>
          <text:p text:style-name="P111">negative, between ‘alcohol’ and ‘density’</text:p>
        </text:list-item>
      </text:list>
      <text:p text:style-name="P46">In all other cases, the correlation coefficient is smaller than 0.54 in absolute value.</text:p>
      <text:p text:style-name="P44"/>
      <text:p text:style-name="P5"/>
      <text:p text:style-name="P5"/>
      <text:p text:style-name="P36">Preprocessing</text:p>
      <text:p text:style-name="P46">The preprocessing utilities are inside the file ‘preprocessing.py’. They serve as to solve three main problems:</text:p>
      <text:list xml:id="list291793019" text:style-name="L3">
        <text:list-item>
          <text:p text:style-name="P112">outlier treatment</text:p>
        </text:list-item>
        <text:list-item>
          <text:p text:style-name="P112">scaling</text:p>
        </text:list-item>
        <text:list-item>
          <text:p text:style-name="P112">imbalance treatment</text:p>
        </text:list-item>
      </text:list>
      <text:p text:style-name="P46"/>
      <text:p text:style-name="P49">For every feature, a value <text:span text:style-name="T5">x</text:span> is considered an outlier if:</text:p>
      <text:p text:style-name="P53"/>
      <text:p text:style-name="P47"><draw:frame draw:style-name="fr2" draw:name="Object1" text:anchor-type="as-char" svg:y="-0.1484in" svg:width="2.0902in" svg:height="0.1902in" draw:z-index="0"><draw:object xlink:href="./Object 1" xlink:type="simple" xlink:show="embed" xlink:actuate="onLoad"/><draw:image xlink:href="./ObjectReplacements/Object 1" xlink:type="simple" xlink:show="embed" xlink:actuate="onLoad"/></draw:frame></text:p>
      <text:p text:style-name="P51"/>
      <text:p text:style-name="P49">where <text:span text:style-name="T26">μ </text:span><text:span text:style-name="T35">is that feature’s mean and </text:span><text:span text:style-name="T26">σ </text:span><text:span text:style-name="T35">is that feature’s standard deviation. </text:span><text:span text:style-name="T37">Any outlier value is then clipped to the lower or upper value. </text:span><text:span text:style-name="T35">I chose this definition over the IQR based definition because </text:span><text:span text:style-name="T36">many features have a rather long skew tail which </text:span><text:span text:style-name="T37">is formed by a non indifferent number of records that would be cut short, accumulating too many records at the cutting point.</text:span></text:p>
      <text:p text:style-name="P4"/>
      <text:p text:style-name="P66"><text:soft-page-break/>Each feature is scaled using scikit-learn StandardScaler, which applies the following transformation:</text:p>
      <text:p text:style-name="P48"><draw:frame draw:style-name="fr2" draw:name="Object2" text:anchor-type="as-char" svg:y="-0.25in" svg:width="0.8917in" svg:height="0.3984in" draw:z-index="1"><draw:object xlink:href="./Object 2" xlink:type="simple" xlink:show="embed" xlink:actuate="onLoad"/><draw:image xlink:href="./ObjectReplacements/Object 2" xlink:type="simple" xlink:show="embed" xlink:actuate="onLoad"/><svg:desc>formula</svg:desc></draw:frame></text:p>
      <text:p text:style-name="P52"/>
      <text:p text:style-name="P50">where <text:span text:style-name="T6">x</text:span><text:span text:style-name="T69"> is the value of the feature before scaling, </text:span><text:span text:style-name="T26">μ </text:span><text:span text:style-name="T35">is that feature’s mean and </text:span><text:span text:style-name="T26">σ </text:span><text:span text:style-name="T35">is that feature’s standard deviation. </text:span><text:span text:style-name="T38">This shifts the data into a normal distribution of unit variance and zero mean. Scaling feature is particularly important for learning a linear classifier, because otherwise a feature with a bigger scale would be given more importance by the model weights.</text:span></text:p>
      <text:p text:style-name="P76"/>
      <text:p text:style-name="P67"><text:span text:style-name="T38">F</text:span><text:span text:style-name="T35">inally, as already mentioned, the dataset is moderately unbalanced towards the positive class. In order to help the model learn to better classify the negative class, an imbalance treatment technique known as SMOTETomek is applied using the imbalanced-learn Python package implementation. SMOTETomek consist in first applying the over-sampling technique SMOTE, which generates synthetic data point focusing on the region near the class boundaries, and then cleaning the result using the under-sampling technique based on Tomek links, which focuses on selecting the closest pairs of data points belonging to different classes and eliminating the data point belonging to the majority class.</text:span></text:p>
      <text:p text:style-name="P77">Note that this preprocessing step is applied only on the traning set.</text:p>
      <text:p text:style-name="P78"/>
      <text:p text:style-name="P68"><text:span text:style-name="T35">Of course, care has been taken </text:span><text:span text:style-name="T39">in</text:span><text:span text:style-name="T35"> first generating the </text:span><text:span text:style-name="T39">values (e.g. </text:span><text:span text:style-name="T27">μ</text:span><text:span text:style-name="T40"> and </text:span><text:span text:style-name="T27">σ</text:span><text:span text:style-name="T39">) using only the training set and then applying the same transformation separately to both the training and the test set. </text:span><text:span text:style-name="T41">This is especially important when doing nested cross validation: the data is passed unprocessed into the inner loop, where for each fold data gets preprocessed fitting the </text:span><text:span text:style-name="T42">clipper, the </text:span><text:span text:style-name="T41">scaler </text:span><text:span text:style-name="T42">and the rebalancer only using the current fold’s training set. Once the inner loop is finished and we got the best value of the hyperparameters, the outer loop current fold’s sets are still unprocessed, so we need to once again use the training set to fit the clipper, the </text:span><text:span text:style-name="T41">scaler </text:span><text:span text:style-name="T42">and the rebalancer. This is repeated for each loop of the outer cross validation procedure.</text:span></text:p>
      <text:p text:style-name="P76"/>
      <text:p text:style-name="P76"/>
      <text:p text:style-name="P76"/>
      <text:p text:style-name="P36">Models</text:p>
      <text:p text:style-name="P69">Both the SVM model and the Logistic Regression model have been implemented using <text:span text:style-name="T167">P</text:span><text:span text:style-name="T169">egasos</text:span><text:span text:style-name="T167">,</text:span> the Stochastic Gradient Descent (SDG) algorithm presented in [2]<text:span text:style-name="T167">. </text:span><text:span text:style-name="T195">I chose to implement the basic version and not the mini-batch version for ease of implementation and because it’s the version presented during the course lecture. </text:span><text:span text:style-name="T186">During the </text:span><text:span text:style-name="T168">random drawing procedure </text:span><text:span text:style-name="T186">I keep track of epochs, i.e. the number of times we extracted a number of samples equal to dimension of the training set</text:span><text:span text:style-name="T168">. </text:span><text:span text:style-name="T186">This is done</text:span><text:span text:style-name="T167"> in order to implement a stopping criterium, which is </text:span><text:span text:style-name="T168">to stop the algorithm once a prefixed number of </text:span><text:span text:style-name="T186">epochs</text:span><text:span text:style-name="T168"> </text:span><text:span text:style-name="T7">max_iter_no_changes</text:span><text:span text:style-name="T168"> has passed without seeing an improvement in the value of the objective function within a prefixed tolerance </text:span><text:span text:style-name="T7">tol</text:span><text:span text:style-name="T168">. This was inspired by the scikit-learn implementation of the SGD procedure.</text:span></text:p>
      <text:p text:style-name="P70"/>
      <text:p text:style-name="P70"/>
      <text:p text:style-name="P38">SVM</text:p>
      <text:p text:style-name="P40"/>
      <text:p text:style-name="P20">We wish to learn a linear predictor <text:span text:style-name="T5">h</text:span>: <text:span text:style-name="T5">X</text:span> <text:span text:style-name="T48">−</text:span><text:span text:style-name="T59">&gt;</text:span> {-1, 1} such that <text:span text:style-name="T5">h</text:span>(<text:span text:style-name="T5">x</text:span>) = <text:span text:style-name="T5">sgn</text:span>(<text:span text:style-name="T5">w</text:span><text:span text:style-name="T76">T</text:span><text:span text:style-name="T155">x</text:span><text:span text:style-name="T79"> + </text:span><text:span text:style-name="T155">b</text:span><text:span text:style-name="T79">), which given an input </text:span><text:span text:style-name="T156">data point</text:span><text:span text:style-name="T79"> </text:span><text:span text:style-name="T155">x</text:span><text:span text:style-name="T79"> will predict its label </text:span><text:span text:style-name="T155">y</text:span><text:span text:style-name="T79">. The idea at the </text:span><text:span text:style-name="T80">core </text:span><text:span text:style-name="T79">of SVMs is to pick the parameters </text:span><text:span text:style-name="T155">w</text:span><text:span text:style-name="T157"> </text:span><text:span text:style-name="T158"><text:s/>and</text:span><text:span text:style-name="T157"> </text:span><text:span text:style-name="T155">b</text:span><text:span text:style-name="T79"> such that the geometric margin between the hyperplane </text:span><text:span text:style-name="T155">w</text:span><text:span text:style-name="T76">T</text:span><text:span text:style-name="T155">x</text:span><text:span text:style-name="T79"> + </text:span><text:span text:style-name="T155">b</text:span><text:span text:style-name="T79"> and the closest data points is maximized, while also minimizing the loss that we incur when a data point is misclassified. This objective can be expressed by the following objective function, which we want to minimize:</text:span></text:p>
      <text:p text:style-name="P57"/>
      <text:p text:style-name="P16"><text:s text:c="45"/><draw:frame draw:style-name="fr2" draw:name="Object3" text:anchor-type="as-char" svg:y="-0.2807in" svg:width="2.9764in" svg:height="0.4484in" draw:z-index="2"><draw:object xlink:href="./Object 3" xlink:type="simple" xlink:show="embed" xlink:actuate="onLoad"/><draw:image xlink:href="./ObjectReplacements/Object 3" xlink:type="simple" xlink:show="embed" xlink:actuate="onLoad"/></draw:frame><text:s text:c="35"/><text:span text:style-name="T169">(1)</text:span> <text:s text:c="5"/></text:p>
      <text:p text:style-name="P58"><text:soft-page-break/></text:p>
      <text:p text:style-name="P19">where <text:span text:style-name="T28">λ</text:span><text:span text:style-name="T57"> is an hyperparameter controlling the strength of the regularization, </text:span><text:span text:style-name="T58">m</text:span><text:span text:style-name="T57"> is the size of the training set </text:span><text:span text:style-name="T60">and [</text:span><text:span text:style-name="T49">∙</text:span><text:span text:style-name="T60">]</text:span><text:span text:style-name="T160">+</text:span><text:span text:style-name="T82"> is a function that returns its argument if it is positive and zero otherwise.</text:span></text:p>
      <text:p text:style-name="P23"><text:span text:style-name="T82">T</text:span><text:span text:style-name="T81">he algorithm is a </text:span><text:span text:style-name="T83">SGD</text:span><text:span text:style-name="T81"> algorithm, so </text:span><text:span text:style-name="T83">after</text:span><text:span text:style-name="T81"> initializ</text:span><text:span text:style-name="T83">ing</text:span><text:span text:style-name="T81"> </text:span><text:span text:style-name="T84">w</text:span><text:span text:style-name="T81"> = 0, </text:span><text:span text:style-name="T84">b</text:span><text:span text:style-name="T81"> = 0, </text:span><text:span text:style-name="T110">for each update step </text:span><text:span text:style-name="T85">t</text:span><text:span text:style-name="T110"> it performs the following operation:</text:span></text:p>
      <text:p text:style-name="P79"/>
      <text:list xml:id="list1199672643" text:style-name="L4">
        <text:list-item>
          <text:p text:style-name="P98"><text:span text:style-name="T81">draw a random sample </text:span><text:span text:style-name="T85">i</text:span></text:p>
        </text:list-item>
        <text:list-item>
          <text:p text:style-name="P101"><text:span text:style-name="T81">approximate the objective function (1) with</text:span><text:span text:style-name="T81"><draw:frame draw:style-name="fr3" draw:name="Object5" text:anchor-type="as-char" svg:y="-0.1937in" svg:width="2.722in" svg:height="0.3429in" draw:z-index="3"><draw:object xlink:href="./Object 5" xlink:type="simple" xlink:show="embed" xlink:actuate="onLoad"/><draw:image xlink:href="./ObjectReplacements/Object 5" xlink:type="simple" xlink:show="embed" xlink:actuate="onLoad"/><svg:desc>formula</svg:desc></draw:frame></text:span></text:p>
        </text:list-item>
        <text:list-item>
          <text:p text:style-name="P102"><text:span text:style-name="T81">compute the sub-gradient </text:span><text:span text:style-name="T111">with respect to </text:span><text:span text:style-name="T86">w</text:span><text:span text:style-name="T111"> </text:span><text:span text:style-name="T81"><draw:frame draw:style-name="fr1" draw:name="Object6" text:anchor-type="as-char" svg:y="-0.172in" svg:width="2.3835in" svg:height="0.2327in" draw:z-index="4"><draw:object xlink:href="./Object 6" xlink:type="simple" xlink:show="embed" xlink:actuate="onLoad"/><draw:image xlink:href="./ObjectReplacements/Object 6" xlink:type="simple" xlink:show="embed" xlink:actuate="onLoad"/></draw:frame></text:span><text:span text:style-name="T81">, where </text:span><text:span text:style-name="T81"><draw:frame draw:style-name="fr1" draw:name="Object7" text:anchor-type="as-char" svg:y="-0.172in" svg:width="1.3457in" svg:height="0.2327in" draw:z-index="5"><draw:object xlink:href="./Object 7" xlink:type="simple" xlink:show="embed" xlink:actuate="onLoad"/><draw:image xlink:href="./ObjectReplacements/Object 7" xlink:type="simple" xlink:show="embed" xlink:actuate="onLoad"/><svg:desc>formula</svg:desc></draw:frame></text:span><text:span text:style-name="T81"><text:s/>is the indicator function, </text:span><text:span text:style-name="T111">and </text:span><text:span text:style-name="T81"><text:s/></text:span><text:span text:style-name="T111">the sub-gradient with respect to </text:span><text:span text:style-name="T86">b </text:span><text:span text:style-name="T81"><draw:frame draw:style-name="fr1" draw:name="Object9" text:anchor-type="as-char" svg:y="-0.172in" svg:width="1.9701in" svg:height="0.2327in" draw:z-index="8"><draw:object xlink:href="./Object 9" xlink:type="simple" xlink:show="embed" xlink:actuate="onLoad"/><draw:image xlink:href="./ObjectReplacements/Object 9" xlink:type="simple" xlink:show="embed" xlink:actuate="onLoad"/><svg:desc>formula</svg:desc></draw:frame></text:span></text:p>
        </text:list-item>
        <text:list-item>
          <text:p text:style-name="P99"><text:span text:style-name="T97">update</text:span><text:span text:style-name="T96"><draw:frame draw:style-name="fr1" draw:name="Object4" text:anchor-type="as-char" svg:y="-0.2437in" svg:width="1.3075in" svg:height="0.3929in" draw:z-index="6"><draw:object xlink:href="./Object 4" xlink:type="simple" xlink:show="embed" xlink:actuate="onLoad"/><draw:image xlink:href="./ObjectReplacements/Object 4" xlink:type="simple" xlink:show="embed" xlink:actuate="onLoad"/></draw:frame></text:span><text:span text:style-name="T96"> </text:span><text:span text:style-name="T111">and </text:span><text:span text:style-name="T96"><draw:frame draw:style-name="fr1" draw:name="Object10" text:anchor-type="as-char" svg:y="-0.2437in" svg:width="1.2201in" svg:height="0.3929in" draw:z-index="13"><draw:object xlink:href="./Object 10" xlink:type="simple" xlink:show="embed" xlink:actuate="onLoad"/><draw:image xlink:href="./ObjectReplacements/Object 10" xlink:type="simple" xlink:show="embed" xlink:actuate="onLoad"/><svg:desc>formula</svg:desc></draw:frame></text:span><text:span text:style-name="T81">(where the step size is carefully chosen in order to </text:span><text:span text:style-name="T112">have a guarantee on the</text:span><text:span text:style-name="T81"> convergence rate for the algorithm)</text:span></text:p>
        </text:list-item>
      </text:list>
      <text:p text:style-name="P2"/>
      <text:p text:style-name="P72">until the stopping criterium is satisfied.</text:p>
      <text:p text:style-name="P33"><text:span text:style-name="T119">C</text:span><text:span text:style-name="T82">omputing the loss </text:span><text:span text:style-name="T119">is the bottleneck for the algorithm, since it </text:span><text:span text:style-name="T82">takes time </text:span><text:span text:style-name="T89">O</text:span><text:span text:style-name="T82">(</text:span><text:span text:style-name="T90">d</text:span><text:span text:style-name="T89">m</text:span><text:span text:style-name="T82">), </text:span><text:span text:style-name="T118">where </text:span><text:span text:style-name="T90">d</text:span><text:span text:style-name="T118"> is the number of features and </text:span><text:span text:style-name="T90">m</text:span><text:span text:style-name="T118"> is the number of training data points,</text:span><text:span text:style-name="T82"> </text:span><text:span text:style-name="T120">while all other operations take time </text:span><text:span text:style-name="T91">O</text:span><text:span text:style-name="T120">(</text:span><text:span text:style-name="T91">d</text:span><text:span text:style-name="T120">). I sped up the computation using the python library numba in order to parallelize the cicle over all </text:span><text:span text:style-name="T91">m</text:span><text:span text:style-name="T120"> training data points</text:span><text:span text:style-name="T82">. </text:span></text:p>
      <text:p text:style-name="P2"/>
      <text:p text:style-name="P2"/>
      <text:p text:style-name="P39">Logistic Regression</text:p>
      <text:p text:style-name="P41"/>
      <text:p text:style-name="P21"><text:span text:style-name="T170">In this case w</text:span>e wish to learn <text:span text:style-name="T171">the probability that an input data point belongs to the positive class instead of a directly predicting the class. In order to do so, we train a predictor </text:span><text:span text:style-name="T8">h</text:span><text:span text:style-name="T171">: </text:span><text:span text:style-name="T8">X</text:span><text:span text:style-name="T171"> </text:span><text:span text:style-name="T48">−</text:span><text:span text:style-name="T59">&gt;</text:span> <text:span text:style-name="T46">ℝ</text:span><text:span text:style-name="T50"> and then we use </text:span><text:span text:style-name="T32">σ</text:span><text:span text:style-name="T48">(</text:span><text:span text:style-name="T33">g</text:span><text:span text:style-name="T51">(</text:span><text:span text:style-name="T33">x</text:span><text:span text:style-name="T51">)</text:span><text:span text:style-name="T121">), </text:span><text:span text:style-name="T123">where σ is the logistic function </text:span><text:span text:style-name="T123"><draw:frame draw:style-name="fr1" draw:name="Object13" text:anchor-type="as-char" svg:y="-0.2437in" svg:width="1.0417in" svg:height="0.4165in" draw:z-index="9"><draw:object xlink:href="./Object 13" xlink:type="simple" xlink:show="embed" xlink:actuate="onLoad"/><draw:image xlink:href="./ObjectReplacements/Object 13" xlink:type="simple" xlink:show="embed" xlink:actuate="onLoad"/><svg:desc>formula</svg:desc></draw:frame></text:span><text:span text:style-name="T123">,</text:span><text:span text:style-name="T121"> </text:span><text:span text:style-name="T122">to predict the probability.</text:span></text:p>
      <text:p text:style-name="P24">Since we are predicting a probability, <text:span text:style-name="T172">instead of the hinge loss we use the logarithmic loss, defined as</text:span></text:p>
      <text:p text:style-name="P61"/>
      <text:p text:style-name="P25"><text:s/><draw:frame draw:style-name="fr2" draw:name="Object14" text:anchor-type="as-char" svg:y="-0.2437in" svg:width="3.2382in" svg:height="0.3929in" draw:z-index="10"><draw:object xlink:href="./Object 14" xlink:type="simple" xlink:show="embed" xlink:actuate="onLoad"/><draw:image xlink:href="./ObjectReplacements/Object 14" xlink:type="simple" xlink:show="embed" xlink:actuate="onLoad"/><svg:desc>formula</svg:desc></draw:frame></text:p>
      <text:p text:style-name="P22"/>
      <text:p text:style-name="P27">which can be reformulated as </text:p>
      <text:p text:style-name="P63"/>
      <text:p text:style-name="P26"><draw:frame draw:style-name="fr2" draw:name="Object15" text:anchor-type="as-char" svg:y="-0.172in" svg:width="1.6528in" svg:height="0.2193in" draw:z-index="12"><draw:object xlink:href="./Object 15" xlink:type="simple" xlink:show="embed" xlink:actuate="onLoad"/><draw:image xlink:href="./ObjectReplacements/Object 15" xlink:type="simple" xlink:show="embed" xlink:actuate="onLoad"/><svg:desc>formula</svg:desc></draw:frame></text:p>
      <text:p text:style-name="P62"/>
      <text:p text:style-name="P28">using the facts that ŷ <text:span text:style-name="T173">= </text:span><text:span text:style-name="T32">σ</text:span><text:span text:style-name="T52">(</text:span><text:span text:style-name="T33">g</text:span><text:span text:style-name="T51">(</text:span><text:span text:style-name="T33">x</text:span><text:span text:style-name="T51">)</text:span><text:span text:style-name="T124">) , </text:span><text:span text:style-name="T125">and </text:span>1 - <text:span text:style-name="T32">σ</text:span><text:span text:style-name="T52">(</text:span><text:span text:style-name="T31">z</text:span><text:span text:style-name="T124">) </text:span><text:span text:style-name="T121">= </text:span><text:span text:style-name="T128">σ</text:span><text:span text:style-name="T124">(</text:span><text:span text:style-name="T127">-z</text:span><text:span text:style-name="T124">).</text:span></text:p>
      <text:p text:style-name="P29"><text:span text:style-name="T124">I</text:span><text:span text:style-name="T121">f we wish to then turn the prediction of the probability into an actual class prediction, all we have to do is set a threshold (in the project the threshold has been set to 0.5) on the probability value such that we predict positive if the probability is equal or higher and negative is the probability is smaller. This forms a decision boundary in the feature space, much like in the SVM case, </text:span><text:span text:style-name="T126">given by the equation </text:span><text:span text:style-name="T128">σ</text:span><text:span text:style-name="T124">(</text:span><text:span text:style-name="T129">g</text:span><text:span text:style-name="T122">(</text:span><text:span text:style-name="T129">x</text:span><text:span text:style-name="T122">)</text:span><text:span text:style-name="T124">) </text:span><text:span text:style-name="T126">= </text:span><text:span text:style-name="T130">threshold. </text:span><text:span text:style-name="T137">If threshold is set to 0.5, this is equivalent to </text:span><text:span text:style-name="T129">g</text:span><text:span text:style-name="T139">(</text:span><text:span text:style-name="T129">x</text:span><text:span text:style-name="T139">) </text:span><text:span text:style-name="T137">= 0, because the logistic function assumes value 0.5 if and only if its argument is equal to zero. </text:span></text:p>
      <text:p text:style-name="P30"><text:span text:style-name="T124">I</text:span><text:span text:style-name="T121">n our case, we want to learn a linear predictor, so we can express </text:span><text:span text:style-name="T129">g</text:span><text:span text:style-name="T139"> </text:span><text:span text:style-name="T136">as </text:span><text:span text:style-name="T129">g</text:span><text:span text:style-name="T139">(</text:span><text:span text:style-name="T129">x</text:span><text:span text:style-name="T139">) </text:span><text:span text:style-name="T136">= </text:span><text:span text:style-name="T127">w</text:span><text:span text:style-name="T71">T</text:span><text:span text:style-name="T127">x</text:span><text:span text:style-name="T136"> + </text:span><text:span text:style-name="T127">b</text:span><text:span text:style-name="T138">. </text:span><text:span text:style-name="T136">After adding a regularization term to prevent overfitting, the objective function to minimize is then</text:span></text:p>
      <text:p text:style-name="P60"/>
      <text:p text:style-name="P17"><text:s text:c="45"/><draw:frame draw:style-name="fr2" draw:name="Object8" text:anchor-type="as-char" svg:y="-0.2807in" svg:width="3.0508in" svg:height="0.4484in" draw:z-index="7"><draw:object xlink:href="./Object 8" xlink:type="simple" xlink:show="embed" xlink:actuate="onLoad"/><draw:image xlink:href="./ObjectReplacements/Object 8" xlink:type="simple" xlink:show="embed" xlink:actuate="onLoad"/><svg:desc>formula</svg:desc></draw:frame><text:s text:c="33"/><text:span text:style-name="T169">(</text:span><text:span text:style-name="T174">2</text:span><text:span text:style-name="T169">)</text:span> <text:s text:c="5"/></text:p>
      <text:p text:style-name="P59"/>
      <text:p text:style-name="P18">where <text:span text:style-name="T175">once again</text:span> <text:span text:style-name="T28">λ</text:span><text:span text:style-name="T57"> is an hyperparameter controlling the strength of the regularization </text:span><text:span text:style-name="T61">and</text:span><text:span text:style-name="T57"> </text:span><text:span text:style-name="T58">m</text:span><text:span text:style-name="T57"> is the size of the training set.</text:span></text:p>
      <text:p text:style-name="P31"><text:soft-page-break/><text:span text:style-name="T57">W</text:span><text:span text:style-name="T56">e can use the exact same SGD algorithm presented in the SVM section, the only difference being the computation of the gradient</text:span><text:span text:style-name="T62">s</text:span><text:span text:style-name="T56">, which now yields:</text:span></text:p>
      <text:p text:style-name="P64"/>
      <text:p text:style-name="P32"><draw:frame draw:style-name="fr1" draw:name="Object16" text:anchor-type="as-char" svg:y="-0.172in" svg:width="2.5165in" svg:height="0.2327in" draw:z-index="11"><draw:object xlink:href="./Object 16" xlink:type="simple" xlink:show="embed" xlink:actuate="onLoad"/><draw:image xlink:href="./ObjectReplacements/Object 16" xlink:type="simple" xlink:show="embed" xlink:actuate="onLoad"/><svg:desc>formula</svg:desc></draw:frame></text:p>
      <text:p text:style-name="P65"/>
      <text:p text:style-name="P100"><draw:frame draw:style-name="fr1" draw:name="Object11" text:anchor-type="as-char" svg:y="-0.172in" svg:width="2.0173in" svg:height="0.2327in" draw:z-index="14"><draw:object xlink:href="./Object 11" xlink:type="simple" xlink:show="embed" xlink:actuate="onLoad"/><draw:image xlink:href="./ObjectReplacements/Object 11" xlink:type="simple" xlink:show="embed" xlink:actuate="onLoad"/><svg:desc>formula</svg:desc></draw:frame></text:p>
      <text:p text:style-name="P100"/>
      <text:p text:style-name="P73"/>
      <text:p text:style-name="P73"/>
      <text:p text:style-name="P36">Kernels</text:p>
      <text:p text:style-name="P81">We now wish to expand the class of the learnable predictors beyond just linear predictors. In order to do so, we can <text:span text:style-name="T177">create new features by taking non-linear combinations of the base features (more formally, we </text:span>apply a feature map <text:span text:style-name="T29">φ</text:span><text:span text:style-name="T55">: </text:span><text:span text:style-name="T54">ℝ</text:span><text:span text:style-name="T72">d</text:span><text:span text:style-name="T63"> </text:span><text:span text:style-name="T53">−</text:span><text:span text:style-name="T65">&gt;</text:span><text:span text:style-name="T64"> </text:span><text:span text:style-name="T66">H, </text:span><text:span text:style-name="T67">where </text:span><text:span text:style-name="T66">H</text:span><text:span text:style-name="T67"> is a higher dimensional space). Learning a linear predictor in </text:span><text:span text:style-name="T66">H</text:span><text:span text:style-name="T67"> is now akin to learning a non-linear predictor in the original space </text:span><text:span text:style-name="T54">ℝ</text:span><text:span text:style-name="T72">d</text:span><text:span text:style-name="T144">.</text:span></text:p>
      <text:p text:style-name="P82"><text:span text:style-name="T143">Such mappings </text:span><text:span text:style-name="T150">φ</text:span><text:span text:style-name="T143"> quickly become computationally infeasible, </text:span><text:span text:style-name="T146">but this problem can be avoided by using the so called “kernel trick”. If </text:span><text:span text:style-name="T147">we consider a model in which </text:span><text:span text:style-name="T146">the data points </text:span><text:span text:style-name="T147">interact with each other only via inner product, then</text:span><text:span text:style-name="T146"> given a kernel function </text:span><text:span text:style-name="T151">K</text:span><text:span text:style-name="T146">: </text:span><text:span text:style-name="T151">X</text:span><text:span text:style-name="T113"> </text:span><text:span text:style-name="T145">−</text:span><text:span text:style-name="T116">&gt;</text:span><text:span text:style-name="T114"> </text:span><text:span text:style-name="T117">X </text:span><text:span text:style-name="T115">which computes the inner product in </text:span><text:span text:style-name="T117">H</text:span><text:span text:style-name="T115"> (that is </text:span><text:span text:style-name="T117">K</text:span><text:span text:style-name="T115">(</text:span><text:span text:style-name="T117">x</text:span><text:span text:style-name="T115">, </text:span><text:span text:style-name="T117">y</text:span><text:span text:style-name="T115">) = &lt;</text:span><text:span text:style-name="T150">φ</text:span><text:span text:style-name="T146">(</text:span><text:span text:style-name="T151">x</text:span><text:span text:style-name="T146">), </text:span><text:span text:style-name="T150">φ</text:span><text:span text:style-name="T146">(</text:span><text:span text:style-name="T151">y</text:span><text:span text:style-name="T146">)&gt;), </text:span><text:span text:style-name="T147">we can entirely bypass the computation of <text:s/></text:span><text:span text:style-name="T150">φ</text:span><text:span text:style-name="T143"> </text:span><text:span text:style-name="T147">altogether by computing </text:span><text:span text:style-name="T152">K</text:span><text:span text:style-name="T147"> instead.</text:span></text:p>
      <text:p text:style-name="P86"><text:span text:style-name="T143">Both (1) and (2) satisfy the hypothesis of the Representer theorem, provided that we substitute the inner products in the feature space </text:span><text:span text:style-name="T150">w</text:span><text:span text:style-name="T73">T</text:span><text:span text:style-name="T150">x</text:span><text:span text:style-name="T143"> with the more general inner product of a RKHS <text:s text:c="10"/>&lt;</text:span><text:span text:style-name="T153">φ</text:span><text:span text:style-name="T146">(</text:span><text:span text:style-name="T150">w</text:span><text:span text:style-name="T146">), </text:span><text:span text:style-name="T153">φ</text:span><text:span text:style-name="T146">(</text:span><text:span text:style-name="T150">x</text:span><text:span text:style-name="T146">)&gt;. </text:span><text:span text:style-name="T143">Since the theorem holds, we can express the minimizers </text:span><text:span text:style-name="T154">w</text:span><text:span text:style-name="T74">*</text:span><text:span text:style-name="T148"> </text:span><text:span text:style-name="T143">of (1) and (2) as a linear combination of the projected training data points:</text:span></text:p>
      <text:p text:style-name="P114"/>
      <text:p text:style-name="P116"><draw:frame draw:style-name="fr2" draw:name="Object12" text:anchor-type="as-char" svg:y="-0.2807in" svg:width="2.6189in" svg:height="0.4484in" draw:z-index="15"><draw:object xlink:href="./Object 12" xlink:type="simple" xlink:show="embed" xlink:actuate="onLoad"/><draw:image xlink:href="./ObjectReplacements/Object 12" xlink:type="simple" xlink:show="embed" xlink:actuate="onLoad"/><svg:desc>formula</svg:desc></draw:frame></text:p>
      <text:p text:style-name="P115"/>
      <text:p text:style-name="P80"><text:span text:style-name="T148">We can then limit our search space only to elements of the RKHS which can be represented by the coefficients </text:span><text:span text:style-name="T154">α</text:span><text:span text:style-name="T148">. </text:span><text:span text:style-name="T149">Note that this allows us to learn a predictor even when the RKHS has infinite dimensions.</text:span></text:p>
      <text:p text:style-name="P117"/>
      <text:p text:style-name="P11"><text:span text:style-name="T176">The extension of the models to kernelized form is achieved following the proposal found in [</text:span><text:span text:style-name="T187">3</text:span><text:span text:style-name="T176">], </text:span><text:span text:style-name="T188">with the additional incorporation of the augmented kernel trick in order to easily learn the bias term.</text:span></text:p>
      <text:p text:style-name="P11"><text:span text:style-name="T178">The standard Representer Theorem dictates that an explicit, unpenalized bias term </text:span><text:span text:style-name="T11">b</text:span><text:span text:style-name="T178"> introduces a strict equality constraint </text:span><text:span text:style-name="T178"><draw:frame draw:style-name="fr1" draw:name="Object17" text:anchor-type="as-char" svg:y="-0.2807in" svg:width="0.8866in" svg:height="0.4484in" draw:z-index="16"><draw:object xlink:href="./Object 17" xlink:type="simple" xlink:show="embed" xlink:actuate="onLoad"/><draw:image xlink:href="./ObjectReplacements/Object 17" xlink:type="simple" xlink:show="embed" xlink:actuate="onLoad"/><svg:desc>formula</svg:desc></draw:frame></text:span><text:span text:style-name="T178"><text:s/>into the dual space. This hard constraint is computationally incompatible with single-sample SGD updates. To eliminate this constraint, the bias is embedded directly into the RKHS by appending a constant feature dimension </text:span><text:span text:style-name="T179">with value 1</text:span><text:span text:style-name="T178"> to the implicit feature map:</text:span></text:p>
      <text:p text:style-name="P54"/>
      <text:p text:style-name="P43"><draw:frame draw:style-name="fr1" draw:name="Object18" text:anchor-type="as-char" svg:y="-0.2453in" svg:width="2.2516in" svg:height="0.4311in" draw:z-index="17"><draw:object xlink:href="./Object 18" xlink:type="simple" xlink:show="embed" xlink:actuate="onLoad"/><draw:image xlink:href="./ObjectReplacements/Object 18" xlink:type="simple" xlink:show="embed" xlink:actuate="onLoad"/><svg:desc>formula</svg:desc></draw:frame></text:p>
      <text:p text:style-name="P126"/>
      <text:p text:style-name="P129">Applying the kernel trick to this augmented space yields:</text:p>
      <text:p text:style-name="P55"/>
      <text:p text:style-name="P43"><draw:frame draw:style-name="fr1" draw:name="Object19" text:anchor-type="as-char" svg:y="-0.152in" svg:width="4.8193in" svg:height="0.2134in" draw:z-index="18"><draw:object xlink:href="./Object 19" xlink:type="simple" xlink:show="embed" xlink:actuate="onLoad"/><draw:image xlink:href="./ObjectReplacements/Object 19" xlink:type="simple" xlink:show="embed" xlink:actuate="onLoad"/><svg:desc>formula</svg:desc></draw:frame></text:p>
      <text:p text:style-name="P56"/>
      <text:p text:style-name="P12"><text:span text:style-name="T181">while the computation for the inner product between the predictor and a general data point </text:span><text:span text:style-name="T12">x</text:span><text:span text:style-name="T181"> becomes:</text:span></text:p>
      <text:p text:style-name="P127"/>
      <text:p text:style-name="P130"><draw:frame draw:style-name="fr1" draw:name="Object20" text:anchor-type="as-char" svg:y="-0.152in" svg:width="3.4252in" svg:height="0.2134in" draw:z-index="19"><draw:object xlink:href="./Object 20" xlink:type="simple" xlink:show="embed" xlink:actuate="onLoad"/><draw:image xlink:href="./ObjectReplacements/Object 20" xlink:type="simple" xlink:show="embed" xlink:actuate="onLoad"/><svg:desc>formula</svg:desc></draw:frame></text:p>
      <text:p text:style-name="P128"/>
      <text:p text:style-name="P12"><text:span text:style-name="T180">This </text:span><text:span text:style-name="T181">has the side effect of</text:span><text:span text:style-name="T180"> subject</text:span><text:span text:style-name="T181">ing</text:span><text:span text:style-name="T180"> the bias to the regularization penalty, </text:span><text:span text:style-name="T181">that is the SGD now minimizes </text:span><text:span text:style-name="T181"><draw:frame draw:style-name="fr1" draw:name="Object21" text:anchor-type="as-char" svg:y="-0.1937in" svg:width="0.9126in" svg:height="0.3429in" draw:z-index="20"><draw:object xlink:href="./Object 21" xlink:type="simple" xlink:show="embed" xlink:actuate="onLoad"/><draw:image xlink:href="./ObjectReplacements/Object 21" xlink:type="simple" xlink:show="embed" xlink:actuate="onLoad"/><svg:desc>formula</svg:desc></draw:frame></text:span><text:span text:style-name="T180">. Geometrically, this restricts the decision boundary from drifting infinitely </text:span><text:soft-page-break/><text:span text:style-name="T180">far from the origin </text:span><text:span text:style-name="T181">(which is not a problem since the data gets scaled before training)</text:span><text:span text:style-name="T180">, rendering the optimization problem entirely </text:span><text:span text:style-name="T182">unconstrained</text:span><text:span text:style-name="T180"> and highly compatible with stochastic sampling.</text:span></text:p>
      <text:p text:style-name="P88"><text:span text:style-name="T180">T</text:span><text:span text:style-name="T178">he predictor </text:span><text:span text:style-name="T10">w</text:span><text:span text:style-name="T178"> will be represented as </text:span><text:span text:style-name="T13">w</text:span><text:span text:style-name="T183"> = </text:span><text:span text:style-name="T13">sv, </text:span><text:span text:style-name="T70">where </text:span><text:span text:style-name="T13">s</text:span><text:span text:style-name="T70"> is a </text:span><text:span text:style-name="T178">scalar value </text:span><text:span text:style-name="T10">s</text:span><text:span text:style-name="T178"> and </text:span><text:span text:style-name="T13">v</text:span><text:span text:style-name="T183"> is</text:span><text:span text:style-name="T178"> an array <text:s text:c="2"/>containing the coefficients </text:span><text:span text:style-name="T135">α</text:span><text:span text:style-name="T165">i</text:span><text:span text:style-name="T93">y</text:span><text:span text:style-name="T165">i </text:span><text:span text:style-name="T103">for each training vector </text:span><text:span text:style-name="T92">i</text:span><text:span text:style-name="T103">. </text:span><text:span text:style-name="T105">This allows for </text:span><text:span text:style-name="T106">the scaling</text:span><text:span text:style-name="T105"> of the coefficients due to the regularization in constant time rather than in </text:span><text:span text:style-name="T94">O</text:span><text:span text:style-name="T105">(</text:span><text:span text:style-name="T94">m</text:span><text:span text:style-name="T105">), where </text:span><text:span text:style-name="T94">m</text:span><text:span text:style-name="T105"> is the number of training data points. An additional variable </text:span><text:span text:style-name="T93">norm_sq</text:span><text:span text:style-name="T104"> </text:span><text:span text:style-name="T103">will be used to </text:span><text:span text:style-name="T105">cache the value of the squared norm of w</text:span><text:span text:style-name="T103"> </text:span><text:span text:style-name="T105">in order</text:span><text:span text:style-name="T103"> to avoid having to </text:span><text:span text:style-name="T105">expensively</text:span><text:span text:style-name="T103"> compute </text:span><text:span text:style-name="T135">α</text:span><text:span text:style-name="T75">T</text:span><text:span text:style-name="T134">K</text:span><text:span text:style-name="T135">α </text:span><text:span text:style-name="T140">each time we have to evaluate the objective function.</text:span></text:p>
      <text:p text:style-name="P87"><text:span text:style-name="T180">I </text:span><text:span text:style-name="T178">will now describe the kernelized version of the SGD algorithm, which is used both for the SVM and the Logistic Regression, since the only difference is the value of the (sub-)gradient.</text:span></text:p>
      <text:list xml:id="list3980722021" text:style-name="L5">
        <text:list-item>
          <text:p text:style-name="P131"><text:span text:style-name="T190">S</text:span>ave a copy of the input training data points for future use in the prediction function</text:p>
        </text:list-item>
        <text:list-item>
          <text:p text:style-name="P131"><text:span text:style-name="T190">C</text:span>ompute the gram matrix which contains all the inner products of the chosen kernel for each pair of training data points</text:p>
        </text:list-item>
        <text:list-item>
          <text:p text:style-name="P132"><text:span text:style-name="T190">I</text:span>nitialize the vector of coefficients <text:span text:style-name="T9">coeff</text:span><text:span text:style-name="T189"> </text:span><text:span text:style-name="T190">to 0,</text:span><text:span text:style-name="T98"> </text:span><text:span text:style-name="T87">norm_sq</text:span><text:span text:style-name="T99"> to 0 and </text:span><text:span text:style-name="T84">s</text:span><text:span text:style-name="T98"> </text:span><text:span text:style-name="T99">to 1</text:span></text:p>
        </text:list-item>
        <text:list-item>
          <text:p text:style-name="P133"><text:span text:style-name="T98">For </text:span><text:span text:style-name="T84">t</text:span><text:span text:style-name="T98"> = 1,…,</text:span><text:span text:style-name="T84">T </text:span><text:span text:style-name="T98">(</text:span><text:span text:style-name="T84">T</text:span><text:span text:style-name="T98"> is an upper limit on the iterations obtained by multiplying </text:span><text:span text:style-name="T84">m</text:span><text:span text:style-name="T98"> by a parameter with default value 1000):</text:span></text:p>
          <text:list>
            <text:list-item>
              <text:p text:style-name="P134"><text:span text:style-name="T99">extract a random training data point (</text:span><text:span text:style-name="T87">x</text:span><text:span text:style-name="T163">t</text:span><text:span text:style-name="T99">, </text:span><text:span text:style-name="T87">y</text:span><text:span text:style-name="T163">t</text:span><text:span text:style-name="T99">)</text:span></text:p>
            </text:list-item>
            <text:list-item>
              <text:p text:style-name="P134"><text:span text:style-name="T99">compute </text:span><text:span text:style-name="T100">learning rate</text:span><text:span text:style-name="T99"> </text:span><text:span text:style-name="T133">η</text:span><text:span text:style-name="T166">t</text:span><text:span text:style-name="T142"> = 1 / </text:span><text:span text:style-name="T133">λt</text:span></text:p>
            </text:list-item>
            <text:list-item>
              <text:p text:style-name="P136"><text:span text:style-name="T98">compute the inner product</text:span><text:span text:style-name="T132"><draw:frame draw:style-name="fr1" draw:name="Object22" text:anchor-type="as-char" svg:y="-0.152in" svg:width="1.6583in" svg:height="0.2134in" draw:z-index="21"><draw:object xlink:href="./Object 22" xlink:type="simple" xlink:show="embed" xlink:actuate="onLoad"/><draw:image xlink:href="./ObjectReplacements/Object 22" xlink:type="simple" xlink:show="embed" xlink:actuate="onLoad"/><svg:desc>formula</svg:desc></draw:frame></text:span></text:p>
            </text:list-item>
            <text:list-item>
              <text:p text:style-name="P136"><text:span text:style-name="T98">compute </text:span><text:span text:style-name="T84">s</text:span><text:span text:style-name="T98"> ← (1 – 1/t)</text:span><text:span text:style-name="T84">s</text:span><text:span text:style-name="T98"> </text:span></text:p>
            </text:list-item>
            <text:list-item>
              <text:p text:style-name="P137"><text:span text:style-name="T98">modify the entry of </text:span><text:span text:style-name="T84">v</text:span><text:span text:style-name="T98"> corresponding to the selected training data point </text:span><text:span text:style-name="T84">v</text:span><text:span text:style-name="T98"> ← </text:span><text:span text:style-name="T84">v</text:span><text:span text:style-name="T98"> + (</text:span><text:span text:style-name="T84">y</text:span><text:span text:style-name="T161">t</text:span><text:span text:style-name="T133">η</text:span><text:span text:style-name="T166">t</text:span><text:span text:style-name="T141">)</text:span><text:span text:style-name="T133"> </text:span><text:span text:style-name="T142">/</text:span><text:span text:style-name="T133"> </text:span><text:span text:style-name="T131">s</text:span></text:p>
            </text:list-item>
            <text:list-item>
              <text:p text:style-name="P138"><text:span text:style-name="T98">update </text:span><text:span text:style-name="T84">norm_sq</text:span><text:span text:style-name="T98"> using the fact that </text:span><text:span text:style-name="T101">the norm after the update step will be equa</text:span><text:span text:style-name="T102">l to</text:span></text:p>
              <text:p text:style-name="P118"><draw:frame draw:style-name="fr1" draw:name="Object23" text:anchor-type="as-char" svg:y="-0.4508in" svg:width="4.7728in" svg:height="0.8417in" draw:z-index="22"><draw:object xlink:href="./Object 23" xlink:type="simple" xlink:show="embed" xlink:actuate="onLoad"/><draw:image xlink:href="./ObjectReplacements/Object 23" xlink:type="simple" xlink:show="embed" xlink:actuate="onLoad"/><svg:desc>formula</svg:desc></draw:frame></text:p>
            </text:list-item>
          </text:list>
        </text:list-item>
      </text:list>
      <text:p text:style-name="P89"><text:span text:style-name="T98"><text:s text:c="18"/></text:span><text:span text:style-name="T102">where C is the coefficient of </text:span><text:span text:style-name="T88">y</text:span><text:span text:style-name="T162">t</text:span><text:span text:style-name="T88">x</text:span><text:span text:style-name="T162">t</text:span><text:span text:style-name="T102"> in the (sub-)gradient of the loss</text:span></text:p>
      <text:p text:style-name="P119"/>
      <text:list xml:id="list235043393207401" text:continue-numbering="true" text:style-name="L5">
        <text:list-item>
          <text:p text:style-name="P139"><text:span text:style-name="T98">make the final value of the coefficients be directly representing </text:span><text:span text:style-name="T84">w</text:span><text:span text:style-name="T98"> by computing </text:span></text:p>
          <text:p text:style-name="P139"><text:span text:style-name="T84">coeff</text:span><text:span text:style-name="T98"> ← </text:span><text:span text:style-name="T84">s</text:span><text:span text:style-name="T98"> * </text:span><text:span text:style-name="T84">coeff</text:span></text:p>
        </text:list-item>
      </text:list>
      <text:p text:style-name="P120"/>
      <text:p text:style-name="P90"><text:span text:style-name="T107">A</text:span><text:span text:style-name="T103">ll of these steps take </text:span><text:span text:style-name="T92">O</text:span><text:span text:style-name="T103">(</text:span><text:span text:style-name="T92">1</text:span><text:span text:style-name="T103">) time, with the exception of the computation of the inner product, which takes time </text:span><text:span text:style-name="T92">O</text:span><text:span text:style-name="T103">(</text:span><text:span text:style-name="T92">m</text:span><text:span text:style-name="T103">), </text:span><text:span text:style-name="T109">and the computation of the loss each epoch to decide if we can do an early stop, which takes time </text:span><text:span text:style-name="T95">O</text:span><text:span text:style-name="T109">(</text:span><text:span text:style-name="T95">m</text:span><text:span text:style-name="T77">2</text:span><text:span text:style-name="T109">), and is therefore once again the bottleneck</text:span><text:span text:style-name="T103">. </text:span><text:span text:style-name="T109">I implemented the same speedup of the computation using numba as in the linear case.</text:span></text:p>
      <text:p text:style-name="P121"/>
      <text:p text:style-name="P91"><text:span text:style-name="T108">A</text:span><text:span text:style-name="T103">fter the model has been trained, prediction can be obtained by computing the gram matrix between the training data points and the test data points, and then for each test data point </text:span><text:span text:style-name="T92">x</text:span><text:span text:style-name="T103"> computing:</text:span></text:p>
      <text:p text:style-name="P124"/>
      <text:p text:style-name="P122"><draw:frame draw:style-name="fr1" draw:name="Object24" text:anchor-type="as-char" svg:y="-0.2807in" svg:width="5.2661in" svg:height="0.4484in" draw:z-index="23"><draw:object xlink:href="./Object 24" xlink:type="simple" xlink:show="embed" xlink:actuate="onLoad"/><draw:image xlink:href="./ObjectReplacements/Object 24" xlink:type="simple" xlink:show="embed" xlink:actuate="onLoad"/><svg:desc>formula</svg:desc></draw:frame></text:p>
      <text:p text:style-name="P125"/>
      <text:p text:style-name="P92"><text:span text:style-name="T108">W</text:span><text:span text:style-name="T103">hich takes </text:span><text:span text:style-name="T92">O</text:span><text:span text:style-name="T103">(</text:span><text:span text:style-name="T92">m</text:span><text:span text:style-name="T103">) time. This could be improved by only storing the support vectors, that is only those vectors for which </text:span><text:span text:style-name="T134">α</text:span><text:span text:style-name="T164">i</text:span><text:span text:style-name="T103"> is non zero, but I did not want to further complicate the code, since this is not a major problem because the dataset used only contains ~6000 records.</text:span></text:p>
      <text:p text:style-name="P123"/>
      <text:p text:style-name="P123"/>
      <text:p text:style-name="P121"/>
      <text:p text:style-name="P121"/>
      <text:p text:style-name="P36">Hyperparameter<text:span text:style-name="T185">s and their</text:span> <text:span text:style-name="T185">t</text:span>uning</text:p>
      <text:p text:style-name="P85">All of the models possess a rather small number of hyperparameters:</text:p>
      <text:list xml:id="list1646405472" text:style-name="L6">
        <text:list-item>
          <text:p text:style-name="P140"><text:soft-page-break/>Both linear models only have <text:span text:style-name="T26">λ</text:span><text:span text:style-name="T35"> as hyperparameter. This controls the trade-off between a smooth decision surface and the minimization of misclassified training examples, with higher values favoring the former and lower values favoring the latter </text:span><text:span text:style-name="T44">(i.e., it controls the strength of the regularization)</text:span></text:p>
        </text:list-item>
        <text:list-item>
          <text:p text:style-name="P135"><text:span text:style-name="T43">The Gaussian kernel has </text:span><text:span text:style-name="T30">λ</text:span><text:span text:style-name="T43">, which has the same role as in the linear models, and in addition </text:span><text:span text:style-name="T44">it has</text:span><text:span text:style-name="T43"> </text:span><text:span text:style-name="T30">γ</text:span><text:span text:style-name="T43">, which</text:span><text:span text:style-name="T35"> defines how much influence a single training example has. The larger </text:span><text:span text:style-name="Source_20_Text"><text:span text:style-name="T30">γ</text:span></text:span><text:span text:style-name="T35"> is, the closer other examples must be to be affected. </text:span><text:span text:style-name="T44">In other words, the higher </text:span><text:span text:style-name="Source_20_Text"><text:span text:style-name="T30">γ </text:span></text:span><text:span text:style-name="Source_20_Text"><text:span text:style-name="T44">is, the closer the model will resemble a 1-NN classifier, </text:span></text:span><text:span text:style-name="Source_20_Text"><text:span text:style-name="T45">with high risk of overfitting</text:span></text:span></text:p>
        </text:list-item>
        <text:list-item>
          <text:p text:style-name="P135"><text:span text:style-name="Source_20_Text"><text:span text:style-name="T44">The Polynomial kernel has </text:span></text:span><text:span text:style-name="Source_20_Text"><text:span text:style-name="T30">λ</text:span></text:span><text:span text:style-name="Source_20_Text"><text:span text:style-name="T43"> </text:span></text:span><text:span text:style-name="Source_20_Text"><text:span text:style-name="T44">as all the other models, and in addition it has the degree </text:span></text:span><text:span text:style-name="Source_20_Text"><text:span text:style-name="T34">d</text:span></text:span><text:span text:style-name="Source_20_Text"><text:span text:style-name="T47">, which controls the maximum degree with which the original features will be combined in the RKHS. A higher degree means a more elaborate decision boundary, but it also means a higher risk of overfitting</text:span></text:span></text:p>
        </text:list-item>
      </text:list>
      <text:p text:style-name="P10"><text:span text:style-name="Source_20_Text"><text:span text:style-name="T44"/></text:span></text:p>
      <text:p text:style-name="P83">Hyperparameter tuning is performed with the support of a python library called “optuna”, which implements a Bayesian optimization algorithm to search the space of hyperparameters. This is an efficient replacement to performing a grid search. The tuning is conducted inside a nested cross- validation framework, <text:span text:style-name="T184">and</text:span> the outer cross-validation procedure does the following <text:span text:style-name="T184">for each fold</text:span>:</text:p>
      <text:list xml:id="list2003511638" text:style-name="L7">
        <text:list-item>
          <text:p text:style-name="P141">it splits the data into train and test set</text:p>
        </text:list-item>
        <text:list-item>
          <text:p text:style-name="P142">it finds the best parameters for the current train set by running the inner cross-validation procedure using only the current train set (which will be further split into train and dev set) for each try of possible hyperparameters values. The metric to be optimized is the cross-validated accuracy</text:p>
        </text:list-item>
        <text:list-item>
          <text:p text:style-name="P143">it trains the model again using the best value of the hyperparameters found and the entire train set</text:p>
        </text:list-item>
      </text:list>
      <text:p text:style-name="P84">The metric reported at the end of the outer cross-validation loop is the accuracy cross-validated by the outer loop.</text:p>
      <text:p text:style-name="P2"/>
      <text:p text:style-name="P2"/>
      <text:p text:style-name="P2"/>
      <text:p text:style-name="P2"/>
      <text:p text:style-name="P36">Evaluation</text:p>
      <text:p text:style-name="P93">The evaluation of the models has been conducted using nested cross validation, setting the number of folds to 5 both for the outer and the inner cycle. Plots showing the evolution of loss, training and testing accuracy <text:span text:style-name="T191">during the training on the training set of each outer fold (performed using the best hyperparameters found thanks to the inner loop) can be found by running the jupyter notebook “model_performance.ipynb”. </text:span><text:span text:style-name="T192">The plots for the loss skip the first </text:span><text:span text:style-name="T194">several hundred </text:span><text:span text:style-name="T192">iterations in order to </text:span><text:span text:style-name="T193">have a more reasonable scale.</text:span></text:p>
      <text:p text:style-name="P144"><text:span text:style-name="T194">T</text:span>he max number of overall iterations <text:span text:style-name="T194">is capped </text:span>to 200 epochs <text:span text:style-name="T194">to limit training time, which was otherwise too long since it was repeated many times over during cross validation</text:span>.</text:p>
      <text:p text:style-name="P144"/>
      <text:p text:style-name="P146">In all cases it is not surprising that the loss and both of the accuracy metrics present a highly unstable profile: this is caused by the fact that we are using a SGD procedure considering a single data point at a time instead of doing mini-batches.</text:p>
      <text:p text:style-name="P144"/>
      <text:p text:style-name="P152"><text:span text:style-name="T197">DISCLAIMER</text:span>: I found out very late that I did not insert a random shuffle of the training set both before applying the outer and the inner cross validation loop, so I did not have enough time to train again some of the models. The models affected are: SVM with Polynomial Kernel, Logistic Regression with Polynomial Kernel, <text:span text:style-name="T204">SVM with Linear Kernel</text:span></text:p>
      <text:p text:style-name="P152">The results and the analysis are therefore biased because of the static initial order of the dataset.</text:p>
      <text:p text:style-name="P152"/>
      <text:p text:style-name="P152"/>
      <text:p text:style-name="P152"><text:s/></text:p>
      <text:p text:style-name="P147"><text:soft-page-break/>SVM with Polynomial Kernel</text:p>
      <text:p text:style-name="P103">The model obtains an overall accura<text:span text:style-name="T201">c</text:span>y metric of 0.689078 on the test set and of 0.767377 on the train set. The model is not overfitting, because looking at the plots, train and test accuracy both grow at the same time, and there’s no clear point in which training accuracy increases but test accuracy starts to decrease. It is somewhat surprising that one of the folds chose to use <text:span text:style-name="T5">degree</text:span> equal to 2 and it obtained almost the same accuracy as the fold that chose <text:span text:style-name="T5">degree</text:span> equal to 11. This could perhaps be explained by the low amount of available data, a problem that is exacerbated by the multiple split into train and test due to nested cross validation.</text:p>
      <text:p text:style-name="P93"/>
      <text:p text:style-name="P148"><text:span text:style-name="T195">Logistic Regression</text:span> with Polynomial Kernel</text:p>
      <text:p text:style-name="P104">The model obtains an overall accura<text:span text:style-name="T201">c</text:span>y metric of 0.706625 on the test set and of 0.767922 on the train set, <text:span text:style-name="T195">which is ever so slightly better than its SVM counterpart; the difference is so small that it can easily be attributed to the random draw of how the folds were formed.</text:span> <text:span text:style-name="T196">In the plot for the first fold there seems to be a slight downward trend in the test accuracy, which could indicate overfitting.</text:span></text:p>
      <text:p text:style-name="P104"/>
      <text:p text:style-name="P149">SVM with <text:span text:style-name="T196">Gaussian</text:span> Kernel</text:p>
      <text:p text:style-name="P107">The model obtains an overall accura<text:span text:style-name="T201">c</text:span>y metric of 0.798368 on the test set and of 1.000000 on the train set. <text:span text:style-name="T198">Even though the training accuracy is perfect while the testing accuracy is not, the model does not seem to be</text:span> overfitting, <text:span text:style-name="T198">since both appear to be following the same exact trend (although it’s hard to tell because of the scale). What is very noticeable is that the early stopping criterium did not trigger for any of the folds, even for fold 4, where the value of the hyperparameters is quite different from the others. </text:span><text:span text:style-name="T201">Looking at the data, this </text:span><text:span text:style-name="T202">probabaly </text:span><text:span text:style-name="T201">happens because the value of the objective function </text:span><text:span text:style-name="T202">at the start is so high (varying between 10</text:span><text:span text:style-name="T78">7</text:span><text:span text:style-name="T159"> and 10</text:span><text:span text:style-name="T78">11</text:span><text:span text:style-name="T159">) that once the contribute of the sum of the losses is minimized, the decrease in the value of the objective function caused by the regularitazion is steep enough, and the tolerance of 0.001 low enough, that the early stopping criterium never kicks in.</text:span></text:p>
      <text:p text:style-name="P106"><text:span text:style-name="T159">A</text:span><text:span text:style-name="T198">nother thing of interest is that fold 4 has the best performance, so it may be that were the search over the best possible parameters given more time </text:span><text:span text:style-name="T201">or had the space itself be allowed to be bigger</text:span><text:span text:style-name="T198">, it would have turn out that values of </text:span><text:span text:style-name="T200">λ</text:span><text:span text:style-name="T68"> and </text:span><text:span text:style-name="T200">γ</text:span><text:span text:style-name="T199"> more similar to those of fold 4</text:span><text:span text:style-name="T198"> would have come out on top as the best in more than one case.</text:span></text:p>
      <text:p text:style-name="P151"/>
      <text:p text:style-name="P149"><text:span text:style-name="T195">Logistic Regression</text:span> with <text:span text:style-name="T196">Gaussian</text:span> Kernel</text:p>
      <text:p text:style-name="P107">The model obtains an overall accura<text:span text:style-name="T201">c</text:span>y metric of 0.800369 on the test set and of 0.999402 on the train set, <text:span text:style-name="T195">which is </text:span><text:span text:style-name="T203">once again </text:span><text:span text:style-name="T195">ever so slightly better than its SVM counterpart; the difference is so small that it can easily be attributed to the random draw of how the folds were formed.</text:span> <text:span text:style-name="T203">There are nontheless some major differences:</text:span></text:p>
      <text:list xml:id="list2866369130" text:style-name="L8">
        <text:list-item>
          <text:p text:style-name="P108">the values of the hyperparameters are much closer to the ones found in fold 4 of the SVM model</text:p>
        </text:list-item>
        <text:list-item>
          <text:p text:style-name="P109">fold 1 and 5 present a clear decrease in test accuracy as training continues after a certain point, which indicates the presence of overfitting. For the other folds it is hard to tell, but that does not seem to be the case</text:p>
        </text:list-item>
        <text:list-item>
          <text:p text:style-name="P109">only fold 5 reached the end without stopping early</text:p>
        </text:list-item>
      </text:list>
      <text:p text:style-name="P110">All of these factor combined seem to indicate that for the Gaussian kernel, logistic regression is preferable.</text:p>
      <text:p text:style-name="P105"/>
      <text:p text:style-name="P149">SVM with <text:span text:style-name="T196">Linear</text:span> Kernel</text:p>
      <text:p text:style-name="P105">The model obtains an overall accura<text:span text:style-name="T201">c</text:span>y metric of 0.689078 on the test set and of 0.767377 on the train set. The model is not overfitting, because looking at the plots, train and test accuracy both grow at the same time, and there’s no clear point in which training accuracy increases but test accuracy starts to decrease. It is somewhat surprising that one of the folds chose to use <text:span text:style-name="T5">degree</text:span> equal to 2 and it obtained almost the same accuracy as the fold that chose <text:span text:style-name="T5">degree</text:span> equal to 11. This could <text:soft-page-break/>perhaps be explained by the low amount of available data, a problem that is exacerbated by the multiple split into train and test due to nested cross validation.</text:p>
      <text:p text:style-name="P151"/>
      <text:p text:style-name="P149"><text:span text:style-name="T195">Logistic Regression</text:span> with <text:span text:style-name="T196">Linear</text:span> Kernel</text:p>
      <text:p text:style-name="P105">The model obtains an overall accura<text:span text:style-name="T201">c</text:span>y metric of 0.706625 on the test set and of 0.767922 on the train set, <text:span text:style-name="T195">which is ever so slightly better than its SVM counterpart; the difference is so small that it can easily be attributed to the random draw of how the folds were formed.</text:span> <text:span text:style-name="T196">In the plot for the first fold there seems to be a slight downward trend in the test accuracy, which could indicate overfitting.</text:span></text:p>
      <text:p text:style-name="P2"/>
      <text:p text:style-name="P150">Linear SVM</text:p>
      <text:p text:style-name="P105">The model obtains an overall accura<text:span text:style-name="T201">c</text:span>y metric of 0.689078 on the test set and of 0.767377 on the train set. The model is not overfitting, because looking at the plots, train and test accuracy both grow at the same time, and there’s no clear point in which training accuracy increases but test accuracy starts to decrease. It is somewhat surprising that one of the folds chose to use <text:span text:style-name="T5">degree</text:span> equal to 2 and it obtained almost the same accuracy as the fold that chose <text:span text:style-name="T5">degree</text:span> equal to 11. This could perhaps be explained by the low amount of available data, a problem that is exacerbated by the multiple split into train and test due to nested cross validation.</text:p>
      <text:p text:style-name="P151"/>
      <text:p text:style-name="P150">Linear Logistic Regression</text:p>
      <text:p text:style-name="P105">The model obtains an overall accura<text:span text:style-name="T201">c</text:span>y metric of 0.706625 on the test set and of 0.767922 on the train set, <text:span text:style-name="T195">which is ever so slightly better than its SVM counterpart; the difference is so small that it can easily be attributed to the random draw of how the folds were formed.</text:span> <text:span text:style-name="T196">In the plot for the first fold there seems to be a slight downward trend in the test accuracy, which could indicate overfitting.</text:span></text:p>
      <text:p text:style-name="P2"/>
      <text:p text:style-name="P2"/>
      <text:p text:style-name="P154">Overall, both of the models seem to achieve very similar results, although it could be argued that the hardcoded threshold of 0.5 for making a prediction out of the probability estimate of Logistic Regression should have been treated as a hyperparameter as well; this could have perhaps changed the Logistic Regression performance.</text:p>
      <text:p text:style-name="P154"/>
      <text:p text:style-name="P154"/>
      <text:p text:style-name="P2"/>
      <text:p text:style-name="P37">Bibliography</text:p>
      <text:p text:style-name="P34"><text:span text:style-name="T4">[1] </text:span><text:span text:style-name="T15">Paulo Cortez, António Cerdeira, Fernando Almeida, Telmo Matos, José Reis, “Modeling wine preferences by data mining from physicochemical properties” </text:span><text:span text:style-name="T19">Decision Support System</text:span><text:span text:style-name="T15">s, </text:span><text:span text:style-name="T19">Volume 47, Issue 4</text:span><text:span text:style-name="T15">, </text:span><text:span text:style-name="T17">(</text:span><text:span text:style-name="T15">2009</text:span><text:span text:style-name="T17">) </text:span><text:span text:style-name="T15">Pages 547-553</text:span></text:p>
      <text:p text:style-name="P71"><text:span text:style-name="T16">[2] </text:span><text:span text:style-name="T14">Shalev-Shwartz, S., Singer, Y., Srebro, N. </text:span><text:span text:style-name="T18">et al., </text:span><text:span text:style-name="T14"><text:s/>“Pegasos: primal estimated sub-gradient solver for SVM”, </text:span><text:span text:style-name="T18">Math. Program.</text:span><text:span text:style-name="T14"> </text:span><text:span text:style-name="T20">127</text:span><text:span text:style-name="T14">, 3–30 (2011)</text:span><text:span text:style-name="T16"> </text:span></text:p>
      <text:p text:style-name="P94"><text:span text:style-name="T21">[3] </text:span><text:span text:style-name="T14">A. Z. Zeyuan, C. Weizhu, W. Gang, Z. Chenguang and C. Zheng, "P-packSVM: Parallel Primal grAdient desCent Kernel SVM," </text:span><text:span text:style-name="Emphasis"><text:span text:style-name="T14">2009 Ninth IEEE International Conference on Data Mining</text:span></text:span><text:span text:style-name="T14">, Miami Beach, FL, USA, 2009, pp. 677-68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9T12:20:58.160990802</meta:creation-date>
    <dc:date>2026-05-31T23:50:41.687473290</dc:date>
    <meta:editing-duration>PT5H27M11S</meta:editing-duration>
    <meta:editing-cycles>20</meta:editing-cycles>
    <meta:generator>LibreOffice/7.3.7.2$Linux_X86_64 LibreOffice_project/30$Build-2</meta:generator>
    <meta:document-statistic meta:table-count="0" meta:image-count="0" meta:object-count="24" meta:page-count="9" meta:paragraph-count="145" meta:word-count="4478" meta:character-count="26267" meta:non-whitespace-character-count="21736"/>
  </office:meta>
</office:document-meta>
</file>

<file path=Object 1/content.xml><?xml version="1.0" encoding="utf-8"?>
<math xmlns="http://www.w3.org/1998/Math/MathML" display="block">
  <semantics>
    <mrow>
      <mi>x</mi>
      <mrow>
        <mspace width="1em"/>
        <mo stretchy="false">&lt;</mo>
        <mspace width="1em"/>
      </mrow>
      <mi>μ</mi>
      <mrow>
        <mspace width="1em"/>
        <mo stretchy="false">−</mo>
        <mspace width="1em"/>
      </mrow>
      <mn>3</mn>
      <mi>σ</mi>
      <mrow>
        <mspace width="2em"/>
        <mo stretchy="false">∨</mo>
        <mspace width="2em"/>
      </mrow>
      <mi>x</mi>
      <mrow>
        <mspace width="1em"/>
        <mo stretchy="false">&gt;</mo>
        <mspace width="1em"/>
      </mrow>
      <mi>μ</mi>
      <mrow>
        <mspace width="1em"/>
        <mo stretchy="false">−</mo>
        <mspace width="1em"/>
      </mrow>
      <mn>3</mn>
      <mi>σ</mi>
    </mrow>
    <annotation encoding="StarMath 5.0">x ``&lt; ``%mu ``- ``3%sigma ````or ````x ``&gt; ``%mu`` - ``3%sigma </annotation>
  </semantics>
</math>
</file>

<file path=Object 10/content.xml><?xml version="1.0" encoding="utf-8"?>
<math xmlns="http://www.w3.org/1998/Math/MathML" display="block">
  <semantics>
    <mrow>
      <mi>b</mi>
      <mspace width="0.5em"/>
      <mo stretchy="false">←</mo>
      <mspace width="0.5em"/>
      <mi>b</mi>
      <mrow>
        <mspace width="2em"/>
        <mo stretchy="false">−</mo>
        <mspace width="2em"/>
      </mrow>
      <mfrac>
        <mn>1</mn>
        <mrow>
          <mi>λ</mi>
          <mi>t</mi>
        </mrow>
      </mfrac>
      <msub>
        <mo stretchy="false">∇</mo>
        <mi>b</mi>
      </msub>
    </mrow>
    <annotation encoding="StarMath 5.0">alignc b `&lt;-`b ~- ~frac {1} {%lambda t} nabla_{b}  </annotation>
  </semantics>
</math>
</file>

<file path=Object 11/content.xml><?xml version="1.0" encoding="utf-8"?>
<math xmlns="http://www.w3.org/1998/Math/MathML" display="block">
  <semantics>
    <mrow>
      <mrow>
        <msub>
          <mo stretchy="false">∇</mo>
          <mi>b</mi>
        </msub>
        <mo stretchy="false">=</mo>
        <mrow>
          <mspace width="2em"/>
          <mo stretchy="false">−</mo>
          <mi>σ</mi>
        </mrow>
      </mrow>
      <mrow>
        <mo fence="true" form="prefix" stretchy="false">(</mo>
        <mrow>
          <mrow>
            <mrow>
              <mo stretchy="false">−</mo>
              <msub>
                <mi>y</mi>
                <mi>i</mi>
              </msub>
            </mrow>
            <mrow>
              <mo fence="true" form="prefix" stretchy="false">(</mo>
              <mrow>
                <mrow>
                  <msup>
                    <mi>w</mi>
                    <mi>T</mi>
                  </msup>
                  <msub>
                    <mi>x</mi>
                    <mi>i</mi>
                  </msub>
                  <mrow>
                    <mspace width="0.5em"/>
                    <mo stretchy="false">+</mo>
                    <mspace width="0.5em"/>
                  </mrow>
                  <mi>b</mi>
                </mrow>
              </mrow>
              <mo fence="true" form="postfix" stretchy="false">)</mo>
            </mrow>
          </mrow>
        </mrow>
        <mo fence="true" form="postfix" stretchy="false">)</mo>
      </mrow>
      <msub>
        <mi>y</mi>
        <mi>i</mi>
      </msub>
    </mrow>
    <annotation encoding="StarMath 5.0">alignc nabla_{b} = ~-%sigma(-y_{i}(w^{T}x_{i} `+ `b))y_{i}</annotation>
  </semantics>
</math>
</file>

<file path=Object 12/content.xml><?xml version="1.0" encoding="utf-8"?>
<math xmlns="http://www.w3.org/1998/Math/MathML" display="block">
  <semantics>
    <mrow>
      <msup>
        <mi>w</mi>
        <mtext>*</mtext>
      </msup>
      <mrow>
        <mspace width="0.5em"/>
        <mo stretchy="false">=</mo>
        <mspace width="0.5em"/>
      </mrow>
      <mrow>
        <munderover>
          <mo stretchy="false">∑</mo>
          <mrow>
            <mi>i</mi>
            <mo stretchy="false">=</mo>
            <mn>1</mn>
          </mrow>
          <mi>m</mi>
        </munderover>
        <msub>
          <mi>α</mi>
          <mi>i</mi>
        </msub>
      </mrow>
      <msub>
        <mi>y</mi>
        <mi>i</mi>
      </msub>
      <mi>ϕ</mi>
      <mrow>
        <mo fence="true" form="prefix" stretchy="false">(</mo>
        <mrow>
          <msub>
            <mi>x</mi>
            <mi>i</mi>
          </msub>
        </mrow>
        <mo fence="true" form="postfix" stretchy="false">)</mo>
      </mrow>
      <mspace width="4em"/>
      <mtext>for some</mtext>
      <mi>α</mi>
      <mrow>
        <mspace width="0.5em"/>
        <mo stretchy="false">∈</mo>
        <mspace width="0.5em"/>
      </mrow>
      <msup>
        <mtext>ℝ</mtext>
        <mtext>d</mtext>
      </msup>
    </mrow>
    <annotation encoding="StarMath 5.0">alignc w^{"*"} `=` sum from{i = 1} to{m} %alpha_{i} y_{i} %phi(x_{i}) ~~"for some" %alpha `in `"ℝ"^{"d"}</annotation>
  </semantics>
</math>
</file>

<file path=Object 13/content.xml><?xml version="1.0" encoding="utf-8"?>
<math xmlns="http://www.w3.org/1998/Math/MathML" display="block">
  <semantics>
    <mrow>
      <mi>σ</mi>
      <mrow>
        <mo fence="true" form="prefix" stretchy="false">(</mo>
        <mrow>
          <mi>z</mi>
        </mrow>
        <mo fence="true" form="postfix" stretchy="false">)</mo>
      </mrow>
      <mrow>
        <mspace width="0.5em"/>
        <mo stretchy="false">=</mo>
        <mspace width="0.5em"/>
      </mrow>
      <mfrac>
        <mn>1</mn>
        <mrow>
          <mn>1</mn>
          <mo stretchy="false">+</mo>
          <msup>
            <mi mathvariant="normal">e</mi>
            <mrow>
              <mo stretchy="false">−</mo>
              <mi>z</mi>
            </mrow>
          </msup>
        </mrow>
      </mfrac>
    </mrow>
    <annotation encoding="StarMath 5.0">alignc %sigma(z)` = `frac {1} {1 + {func e}^{-z} }</annotation>
  </semantics>
</math>
</file>

<file path=Object 14/content.xml><?xml version="1.0" encoding="utf-8"?>
<math xmlns="http://www.w3.org/1998/Math/MathML" display="block">
  <semantics>
    <mrow>
      <mi>l</mi>
      <mrow>
        <mo fence="true" form="prefix" stretchy="false">(</mo>
        <mrow>
          <mrow>
            <mi>y</mi>
            <mi>,</mi>
            <mover accent="true">
              <mi>y</mi>
              <mo stretchy="false">^</mo>
            </mover>
          </mrow>
        </mrow>
        <mo fence="true" form="postfix" stretchy="false">)</mo>
      </mrow>
      <mrow>
        <mspace width="0.5em"/>
        <mo stretchy="false">=</mo>
        <mspace width="0.5em"/>
      </mrow>
      <mtext>𝕀</mtext>
      <mrow>
        <mo fence="true" form="prefix" stretchy="false">[</mo>
        <mrow>
          <mrow>
            <mi>y</mi>
            <mo stretchy="false">=</mo>
            <mrow>
              <mo stretchy="false">+</mo>
              <mn>1</mn>
            </mrow>
          </mrow>
        </mrow>
        <mo fence="true" form="postfix" stretchy="false">]</mo>
      </mrow>
      <mi>log</mi>
      <mfrac>
        <mn>1</mn>
        <mover accent="true">
          <mi>y</mi>
          <mo stretchy="false">^</mo>
        </mover>
      </mfrac>
      <mrow>
        <mspace width="0.5em"/>
        <mo stretchy="false">+</mo>
        <mspace width="0.5em"/>
      </mrow>
      <mtext>𝕀</mtext>
      <mrow>
        <mo fence="true" form="prefix" stretchy="false">[</mo>
        <mrow>
          <mrow>
            <mi>y</mi>
            <mo stretchy="false">=</mo>
            <mrow>
              <mo stretchy="false">−</mo>
              <mn>1</mn>
            </mrow>
          </mrow>
        </mrow>
        <mo fence="true" form="postfix" stretchy="false">]</mo>
      </mrow>
      <mi>log</mi>
      <mfrac>
        <mn>1</mn>
        <mrow>
          <mn>1</mn>
          <mo stretchy="false">−</mo>
          <mover accent="true">
            <mi>y</mi>
            <mo stretchy="false">^</mo>
          </mover>
        </mrow>
      </mfrac>
    </mrow>
    <annotation encoding="StarMath 5.0">alignc l(y, hat y) `=` "𝕀"[y = +1] log {1} over {hat y} ` + ` "𝕀"[y = -1] log {1} over {1 - hat y} </annotation>
  </semantics>
</math>
</file>

<file path=Object 15/content.xml><?xml version="1.0" encoding="utf-8"?>
<math xmlns="http://www.w3.org/1998/Math/MathML" display="block">
  <semantics>
    <mrow>
      <mi>l</mi>
      <mrow>
        <mo fence="true" form="prefix" stretchy="false">(</mo>
        <mrow>
          <mrow>
            <mi>y</mi>
            <mi>,</mi>
            <mi>g</mi>
          </mrow>
        </mrow>
        <mo fence="true" form="postfix" stretchy="false">)</mo>
      </mrow>
      <mrow>
        <mspace width="0.5em"/>
        <mo stretchy="false">=</mo>
        <mspace width="0.5em"/>
      </mrow>
      <mi>log</mi>
      <mrow>
        <mo fence="true" form="prefix" stretchy="false">(</mo>
        <mrow>
          <mrow>
            <mn>1</mn>
            <mrow>
              <mspace width="0.5em"/>
              <mo stretchy="false">+</mo>
              <mspace width="0.5em"/>
            </mrow>
            <msup>
              <mi mathvariant="normal">e</mi>
              <mrow>
                <mrow>
                  <mo stretchy="false">−</mo>
                  <mi>y</mi>
                </mrow>
                <mi>g</mi>
              </mrow>
            </msup>
          </mrow>
        </mrow>
        <mo fence="true" form="postfix" stretchy="false">)</mo>
      </mrow>
    </mrow>
    <annotation encoding="StarMath 5.0">alignc l(y, g) `=` log (1 `+ `{func e}^{-y g})</annotation>
  </semantics>
</math>
</file>

<file path=Object 16/content.xml><?xml version="1.0" encoding="utf-8"?>
<math xmlns="http://www.w3.org/1998/Math/MathML" display="block">
  <semantics>
    <mrow>
      <mrow>
        <msub>
          <mo stretchy="false">∇</mo>
          <mi>w</mi>
        </msub>
        <mo stretchy="false">=</mo>
        <mi>λ</mi>
      </mrow>
      <mi>w</mi>
      <mrow>
        <mspace width="2em"/>
        <mo stretchy="false">−</mo>
        <mspace width="2em"/>
      </mrow>
      <mi>σ</mi>
      <mrow>
        <mo fence="true" form="prefix" stretchy="false">(</mo>
        <mrow>
          <mrow>
            <mrow>
              <mo stretchy="false">−</mo>
              <msub>
                <mi>y</mi>
                <mi>i</mi>
              </msub>
            </mrow>
            <mrow>
              <mo fence="true" form="prefix" stretchy="false">(</mo>
              <mrow>
                <mrow>
                  <msup>
                    <mi>w</mi>
                    <mi>T</mi>
                  </msup>
                  <msub>
                    <mi>x</mi>
                    <mi>i</mi>
                  </msub>
                  <mrow>
                    <mspace width="0.5em"/>
                    <mo stretchy="false">+</mo>
                    <mspace width="0.5em"/>
                  </mrow>
                  <mi>b</mi>
                </mrow>
              </mrow>
              <mo fence="true" form="postfix" stretchy="false">)</mo>
            </mrow>
          </mrow>
        </mrow>
        <mo fence="true" form="postfix" stretchy="false">)</mo>
      </mrow>
      <msub>
        <mi>y</mi>
        <mi>i</mi>
      </msub>
      <msub>
        <mi>x</mi>
        <mi>i</mi>
      </msub>
    </mrow>
    <annotation encoding="StarMath 5.0">alignc nabla_{w} = %lambda w ~-~ %sigma(-y_{i}(w^{T}x_{i} `+ `b))y_{i}x_{i}</annotation>
  </semantics>
</math>
</file>

<file path=Object 17/content.xml><?xml version="1.0" encoding="utf-8"?>
<math xmlns="http://www.w3.org/1998/Math/MathML" display="block">
  <semantics>
    <mrow>
      <mrow>
        <munderover>
          <mo stretchy="false">∑</mo>
          <mrow>
            <mi>i</mi>
            <mo stretchy="false">=</mo>
            <mn>1</mn>
          </mrow>
          <mi>m</mi>
        </munderover>
        <msub>
          <mi>α</mi>
          <mi>i</mi>
        </msub>
      </mrow>
      <msub>
        <mi>y</mi>
        <mi>i</mi>
      </msub>
      <mrow>
        <mspace width="0.5em"/>
        <mo stretchy="false">=</mo>
        <mspace width="0.5em"/>
      </mrow>
      <mn>0</mn>
    </mrow>
    <annotation encoding="StarMath 5.0">alignc sum from {i = 1} to {m} %alpha_{i} y_{i} `=` 0</annotation>
  </semantics>
</math>
</file>

<file path=Object 18/content.xml><?xml version="1.0" encoding="utf-8"?>
<math xmlns="http://www.w3.org/1998/Math/MathML" display="block">
  <semantics>
    <mrow>
      <msub>
        <mi>ϕ</mi>
        <mi mathvariant="italic">aug</mi>
      </msub>
      <mrow>
        <mo fence="true" form="prefix" stretchy="false">(</mo>
        <mrow>
          <mi>x</mi>
        </mrow>
        <mo fence="true" form="postfix" stretchy="false">)</mo>
      </mrow>
      <mrow>
        <mspace width="0.5em"/>
        <mo stretchy="false">=</mo>
        <mspace width="0.5em"/>
      </mrow>
      <mrow>
        <mo fence="true" form="prefix" stretchy="true">[</mo>
        <mrow>
          <mtable>
            <mtr>
              <mtd>
                <mrow>
                  <mi>ϕ</mi>
                  <mrow>
                    <mo fence="true" form="prefix" stretchy="false">(</mo>
                    <mrow>
                      <mi>x</mi>
                    </mrow>
                    <mo fence="true" form="postfix" stretchy="false">)</mo>
                  </mrow>
                </mrow>
              </mtd>
            </mtr>
            <mtr>
              <mtd>
                <mn>1</mn>
              </mtd>
            </mtr>
          </mtable>
        </mrow>
        <mo fence="true" form="postfix" stretchy="true">]</mo>
      </mrow>
      <mi>,</mi>
      <mspace width="6em"/>
      <msub>
        <mi>w</mi>
        <mi mathvariant="italic">aug</mi>
      </msub>
      <mrow>
        <mspace width="0.5em"/>
        <mo stretchy="false">=</mo>
        <mspace width="0.5em"/>
      </mrow>
      <mrow>
        <mo fence="true" form="prefix" stretchy="true">[</mo>
        <mrow>
          <mtable>
            <mtr>
              <mtd>
                <mi>w</mi>
              </mtd>
            </mtr>
            <mtr>
              <mtd>
                <mi>b</mi>
              </mtd>
            </mtr>
          </mtable>
        </mrow>
        <mo fence="true" form="postfix" stretchy="true">]</mo>
      </mrow>
      <mi>,</mi>
    </mrow>
    <annotation encoding="StarMath 5.0">alignc %phi_{aug}(x) `=` left [ binom{%phi(x)}{1}  right ], ~~~ w_{aug} `=` left [ binom{w}{b}  right ],</annotation>
  </semantics>
</math>
</file>

<file path=Object 19/content.xml><?xml version="1.0" encoding="utf-8"?>
<math xmlns="http://www.w3.org/1998/Math/MathML" display="block">
  <semantics>
    <mrow>
      <msub>
        <mi>K</mi>
        <mi mathvariant="italic">aug</mi>
      </msub>
      <mrow>
        <mo fence="true" form="prefix" stretchy="false">(</mo>
        <mrow>
          <mrow>
            <mi>x</mi>
            <mi>,</mi>
            <mi>x</mi>
            <mi>'</mi>
          </mrow>
        </mrow>
        <mo fence="true" form="postfix" stretchy="false">)</mo>
      </mrow>
      <mrow>
        <mspace width="0.5em"/>
        <mo stretchy="false">=</mo>
        <mspace width="0.5em"/>
      </mrow>
      <mrow>
        <mo fence="true" form="prefix" stretchy="false">⟨</mo>
        <mrow>
          <mrow>
            <msub>
              <mi>ϕ</mi>
              <mi mathvariant="italic">aug</mi>
            </msub>
            <mrow>
              <mo fence="true" form="prefix" stretchy="false">(</mo>
              <mrow>
                <mi>x</mi>
              </mrow>
              <mo fence="true" form="postfix" stretchy="false">)</mo>
            </mrow>
            <mi>,</mi>
            <msub>
              <mi>ϕ</mi>
              <mi mathvariant="italic">aug</mi>
            </msub>
            <mrow>
              <mo fence="true" form="prefix" stretchy="false">(</mo>
              <mrow>
                <mrow>
                  <mi>x</mi>
                  <mi>'</mi>
                </mrow>
              </mrow>
              <mo fence="true" form="postfix" stretchy="false">)</mo>
            </mrow>
          </mrow>
        </mrow>
        <mo fence="true" form="postfix" stretchy="false">⟩</mo>
      </mrow>
      <mrow>
        <mspace width="0.5em"/>
        <mo stretchy="false">=</mo>
        <mspace width="0.5em"/>
      </mrow>
      <mrow>
        <mrow>
          <mo fence="true" form="prefix" stretchy="false">⟨</mo>
          <mrow>
            <mrow>
              <mi>ϕ</mi>
              <mrow>
                <mo fence="true" form="prefix" stretchy="false">(</mo>
                <mrow>
                  <mi>x</mi>
                </mrow>
                <mo fence="true" form="postfix" stretchy="false">)</mo>
              </mrow>
              <mi>,</mi>
              <mi>ϕ</mi>
              <mrow>
                <mo fence="true" form="prefix" stretchy="false">(</mo>
                <mrow>
                  <mrow>
                    <mi>x</mi>
                    <mi>'</mi>
                  </mrow>
                </mrow>
                <mo fence="true" form="postfix" stretchy="false">)</mo>
              </mrow>
            </mrow>
          </mrow>
          <mo fence="true" form="postfix" stretchy="false">⟩</mo>
        </mrow>
        <mo stretchy="false">+</mo>
        <mrow>
          <mo fence="true" form="prefix" stretchy="false">(</mo>
          <mrow>
            <mrow>
              <mn>1</mn>
              <mo stretchy="false">⋅</mo>
              <mn>1</mn>
            </mrow>
          </mrow>
          <mo fence="true" form="postfix" stretchy="false">)</mo>
        </mrow>
      </mrow>
      <mrow>
        <mspace width="0.5em"/>
        <mo stretchy="false">=</mo>
        <mspace width="0.5em"/>
      </mrow>
      <mi>K</mi>
      <mrow>
        <mrow>
          <mo fence="true" form="prefix" stretchy="false">(</mo>
          <mrow>
            <mrow>
              <mi>x</mi>
              <mi>,</mi>
              <mi>x</mi>
              <mi>'</mi>
            </mrow>
          </mrow>
          <mo fence="true" form="postfix" stretchy="false">)</mo>
        </mrow>
        <mo stretchy="false">+</mo>
        <mn>1</mn>
      </mrow>
    </mrow>
    <annotation encoding="StarMath 5.0">alignc K_{aug}(x, x') `=` langle %phi_{aug}(x), %phi_{aug}(x') rangle `=` langle %phi(x), %phi(x') rangle + (1 cdot 1) `=` K(x, x') + 1  </annotation>
  </semantics>
</math>
</file>

<file path=Object 2/content.xml><?xml version="1.0" encoding="utf-8"?>
<math xmlns="http://www.w3.org/1998/Math/MathML" display="block">
  <semantics>
    <mrow>
      <mi>z</mi>
      <mrow>
        <mspace width="0.5em"/>
        <mo stretchy="false">=</mo>
        <mspace width="0.5em"/>
      </mrow>
      <mfrac>
        <mrow>
          <mi>x</mi>
          <mrow>
            <mspace width="2em"/>
            <mo stretchy="false">−</mo>
            <mspace width="2em"/>
          </mrow>
          <mi>μ</mi>
        </mrow>
        <mrow>
          <mspace width="0.5em"/>
          <mi>σ</mi>
          <mspace width="0.5em"/>
        </mrow>
      </mfrac>
    </mrow>
    <annotation encoding="StarMath 5.0">z `= `frac {x~ - ~%mu} {`%sigma`} </annotation>
  </semantics>
</math>
</file>

<file path=Object 20/content.xml><?xml version="1.0" encoding="utf-8"?>
<math xmlns="http://www.w3.org/1998/Math/MathML" display="block">
  <semantics>
    <mrow>
      <mrow>
        <mo fence="true" form="prefix" stretchy="false">⟨</mo>
        <mrow>
          <mrow>
            <msub>
              <mi>w</mi>
              <mi mathvariant="italic">aug</mi>
            </msub>
            <mi>,</mi>
            <msub>
              <mi>ϕ</mi>
              <mi mathvariant="italic">aug</mi>
            </msub>
            <mrow>
              <mo fence="true" form="prefix" stretchy="false">(</mo>
              <mrow>
                <mi>x</mi>
              </mrow>
              <mo fence="true" form="postfix" stretchy="false">)</mo>
            </mrow>
          </mrow>
        </mrow>
        <mo fence="true" form="postfix" stretchy="false">⟩</mo>
      </mrow>
      <mrow>
        <mspace width="0.5em"/>
        <mo stretchy="false">=</mo>
        <mspace width="0.5em"/>
      </mrow>
      <mrow>
        <mrow>
          <mo fence="true" form="prefix" stretchy="false">⟨</mo>
          <mrow>
            <mrow>
              <mi>w</mi>
              <mi>,</mi>
              <mi>ϕ</mi>
              <mrow>
                <mo fence="true" form="prefix" stretchy="false">(</mo>
                <mrow>
                  <mi>x</mi>
                </mrow>
                <mo fence="true" form="postfix" stretchy="false">)</mo>
              </mrow>
            </mrow>
          </mrow>
          <mo fence="true" form="postfix" stretchy="false">⟩</mo>
        </mrow>
        <mo stretchy="false">+</mo>
        <mrow>
          <mo fence="true" form="prefix" stretchy="false">(</mo>
          <mrow>
            <mrow>
              <mi>b</mi>
              <mo stretchy="false">⋅</mo>
              <mn>1</mn>
            </mrow>
          </mrow>
          <mo fence="true" form="postfix" stretchy="false">)</mo>
        </mrow>
      </mrow>
      <mrow>
        <mspace width="0.5em"/>
        <mo stretchy="false">=</mo>
        <mspace width="0.5em"/>
      </mrow>
      <mrow>
        <mrow>
          <mo fence="true" form="prefix" stretchy="false">⟨</mo>
          <mrow>
            <mrow>
              <mi>w</mi>
              <mi>,</mi>
              <mi>ϕ</mi>
              <mrow>
                <mo fence="true" form="prefix" stretchy="false">(</mo>
                <mrow>
                  <mi>x</mi>
                </mrow>
                <mo fence="true" form="postfix" stretchy="false">)</mo>
              </mrow>
            </mrow>
          </mrow>
          <mo fence="true" form="postfix" stretchy="false">⟩</mo>
        </mrow>
        <mo stretchy="false">+</mo>
        <mi>b</mi>
      </mrow>
    </mrow>
    <annotation encoding="StarMath 5.0">alignc langle w_{aug}, %phi_{aug}(x) rangle `=` langle w, %phi(x) rangle + (b cdot 1) `=` langle w, %phi(x) rangle + b  </annotation>
  </semantics>
</math>
</file>

<file path=Object 21/content.xml><?xml version="1.0" encoding="utf-8"?>
<math xmlns="http://www.w3.org/1998/Math/MathML" display="block">
  <semantics>
    <mrow>
      <mfrac>
        <mi>λ</mi>
        <mn>2</mn>
      </mfrac>
      <mrow>
        <mo fence="true" form="prefix" stretchy="false">(</mo>
        <mrow>
          <mrow>
            <msup>
              <mrow>
                <mo fence="true" form="prefix" stretchy="true">‖</mo>
                <mrow>
                  <mi>w</mi>
                </mrow>
                <mo fence="true" form="postfix" stretchy="true">‖</mo>
              </mrow>
              <mn>2</mn>
            </msup>
            <mo stretchy="false">+</mo>
            <msup>
              <mi>b</mi>
              <mn>2</mn>
            </msup>
          </mrow>
        </mrow>
        <mo fence="true" form="postfix" stretchy="false">)</mo>
      </mrow>
    </mrow>
    <annotation encoding="StarMath 5.0">alignc %lambda over 2 ( left ldline w right rdline^{2} + b^{2} )</annotation>
  </semantics>
</math>
</file>

<file path=Object 22/content.xml><?xml version="1.0" encoding="utf-8"?>
<math xmlns="http://www.w3.org/1998/Math/MathML" display="block">
  <semantics>
    <mrow>
      <mrow>
        <mrow>
          <mo fence="true" form="prefix" stretchy="false">⟨</mo>
          <mrow>
            <mrow>
              <mi>w</mi>
              <mi>,</mi>
              <mi>ϕ</mi>
              <mrow>
                <mo fence="true" form="prefix" stretchy="false">(</mo>
                <mrow>
                  <msub>
                    <mi>x</mi>
                    <mi>t</mi>
                  </msub>
                </mrow>
                <mo fence="true" form="postfix" stretchy="false">)</mo>
              </mrow>
            </mrow>
          </mrow>
          <mo fence="true" form="postfix" stretchy="false">⟩</mo>
        </mrow>
        <mo stretchy="false">=</mo>
        <mi>s</mi>
      </mrow>
      <mrow>
        <mo fence="true" form="prefix" stretchy="false">⟨</mo>
        <mrow>
          <mrow>
            <mi>v</mi>
            <mi>,</mi>
            <mi>ϕ</mi>
            <mrow>
              <mo fence="true" form="prefix" stretchy="false">(</mo>
              <mrow>
                <msub>
                  <mi>x</mi>
                  <mi>t</mi>
                </msub>
              </mrow>
              <mo fence="true" form="postfix" stretchy="false">)</mo>
            </mrow>
          </mrow>
        </mrow>
        <mo fence="true" form="postfix" stretchy="false">⟩</mo>
      </mrow>
    </mrow>
    <annotation encoding="StarMath 5.0">alignc langle w, %phi(x_{t}) rangle = s langle v, %phi(x_{t}) rangle</annotation>
  </semantics>
</math>
</file>

<file path=Object 23/content.xml><?xml version="1.0" encoding="utf-8"?>
<math xmlns="http://www.w3.org/1998/Math/MathML" display="block">
  <semantics>
    <mtable>
      <mtr>
        <mtd>
          <mrow>
            <msup>
              <mrow>
                <mo fence="true" form="prefix" stretchy="false">‖</mo>
                <mrow>
                  <mrow>
                    <mrow>
                      <mi>w</mi>
                      <mo stretchy="false">−</mo>
                      <msub>
                        <mi>η</mi>
                        <mi>t</mi>
                      </msub>
                    </mrow>
                    <mo stretchy="false">∇</mo>
                    <mi>F</mi>
                    <mrow>
                      <mo fence="true" form="prefix" stretchy="false">(</mo>
                      <mrow>
                        <mi>w</mi>
                      </mrow>
                      <mo fence="true" form="postfix" stretchy="false">)</mo>
                    </mrow>
                  </mrow>
                </mrow>
                <mo fence="true" form="postfix" stretchy="false">‖</mo>
              </mrow>
              <mn>2</mn>
            </msup>
            <mrow>
              <mspace width="0.5em"/>
              <mo stretchy="false">=</mo>
              <mspace width="0.5em"/>
            </mrow>
            <msup>
              <mrow>
                <mo fence="true" form="prefix" stretchy="false">‖</mo>
                <mrow>
                  <mrow>
                    <mrow>
                      <mi>w</mi>
                      <mo stretchy="false">−</mo>
                      <mfrac>
                        <mn>1</mn>
                        <mrow>
                          <mi>λ</mi>
                          <mi>t</mi>
                        </mrow>
                      </mfrac>
                    </mrow>
                    <mrow>
                      <mo fence="true" form="prefix" stretchy="false">(</mo>
                      <mrow>
                        <mrow>
                          <mi>λ</mi>
                          <mrow>
                            <mi>w</mi>
                            <mo stretchy="false">−</mo>
                            <msub>
                              <mi mathvariant="italic">Cy</mi>
                              <mi>t</mi>
                            </msub>
                          </mrow>
                          <msub>
                            <mi>x</mi>
                            <mi>t</mi>
                          </msub>
                        </mrow>
                      </mrow>
                      <mo fence="true" form="postfix" stretchy="false">)</mo>
                    </mrow>
                  </mrow>
                </mrow>
                <mo fence="true" form="postfix" stretchy="false">‖</mo>
              </mrow>
              <mn>2</mn>
            </msup>
            <mrow>
              <mspace width="0.5em"/>
              <mo stretchy="false">=</mo>
              <mspace width="0.5em"/>
            </mrow>
            <mrow>
              <msup>
                <mrow>
                  <mo fence="true" form="prefix" stretchy="false">‖</mo>
                  <mrow>
                    <mrow>
                      <mrow>
                        <mo fence="true" form="prefix" stretchy="false">(</mo>
                        <mrow>
                          <mrow>
                            <mn>1</mn>
                            <mo stretchy="false">−</mo>
                            <mfrac>
                              <mn>1</mn>
                              <mi>t</mi>
                            </mfrac>
                          </mrow>
                        </mrow>
                        <mo fence="true" form="postfix" stretchy="false">)</mo>
                      </mrow>
                      <mrow>
                        <mi>w</mi>
                        <mo stretchy="false">+</mo>
                        <msub>
                          <mi>η</mi>
                          <mi>t</mi>
                        </msub>
                      </mrow>
                      <msub>
                        <mi mathvariant="italic">Cy</mi>
                        <mi>t</mi>
                      </msub>
                      <msub>
                        <mi>x</mi>
                        <mi>t</mi>
                      </msub>
                    </mrow>
                  </mrow>
                  <mo fence="true" form="postfix" stretchy="false">‖</mo>
                </mrow>
                <mn>2</mn>
              </msup>
              <mo stretchy="false">=</mo>
              <mspace width="0.5em"/>
            </mrow>
          </mrow>
        </mtd>
      </mtr>
      <mtr>
        <mtd>
          <mrow>
            <mrow>
              <mspace width="0.5em"/>
              <mo stretchy="false">=</mo>
              <mspace width="0.5em"/>
            </mrow>
            <msup>
              <mrow>
                <mo fence="true" form="prefix" stretchy="false">(</mo>
                <mrow>
                  <mrow>
                    <mn>1</mn>
                    <mo stretchy="false">−</mo>
                    <mfrac>
                      <mn>1</mn>
                      <mi>t</mi>
                    </mfrac>
                  </mrow>
                </mrow>
                <mo fence="true" form="postfix" stretchy="false">)</mo>
              </mrow>
              <mn>2</mn>
            </msup>
            <mrow>
              <msup>
                <mrow>
                  <mo fence="true" form="prefix" stretchy="false">‖</mo>
                  <mrow>
                    <mi>w</mi>
                  </mrow>
                  <mo fence="true" form="postfix" stretchy="false">‖</mo>
                </mrow>
                <mn>2</mn>
              </msup>
              <mo stretchy="false">+</mo>
              <mn>2</mn>
            </mrow>
            <mrow>
              <mo fence="true" form="prefix" stretchy="false">(</mo>
              <mrow>
                <mrow>
                  <mn>1</mn>
                  <mo stretchy="false">−</mo>
                  <mfrac>
                    <mn>1</mn>
                    <mi>t</mi>
                  </mfrac>
                </mrow>
              </mrow>
              <mo fence="true" form="postfix" stretchy="false">)</mo>
            </mrow>
            <msub>
              <mi>η</mi>
              <mi>t</mi>
            </msub>
            <msub>
              <mi mathvariant="italic">Cy</mi>
              <mi>t</mi>
            </msub>
            <mrow>
              <mrow>
                <mo fence="true" form="prefix" stretchy="false">⟨</mo>
                <mrow>
                  <mrow>
                    <mi>w</mi>
                    <mi>,</mi>
                    <mi>ϕ</mi>
                    <mrow>
                      <mo fence="true" form="prefix" stretchy="false">(</mo>
                      <mrow>
                        <msub>
                          <mi>x</mi>
                          <mi>t</mi>
                        </msub>
                      </mrow>
                      <mo fence="true" form="postfix" stretchy="false">)</mo>
                    </mrow>
                  </mrow>
                </mrow>
                <mo fence="true" form="postfix" stretchy="false">⟩</mo>
              </mrow>
              <mo stretchy="false">+</mo>
              <msup>
                <mrow>
                  <mo fence="true" form="prefix" stretchy="false">(</mo>
                  <mrow>
                    <mrow>
                      <msub>
                        <mi>η</mi>
                        <mi>t</mi>
                      </msub>
                      <msub>
                        <mi mathvariant="italic">Cy</mi>
                        <mi>t</mi>
                      </msub>
                    </mrow>
                  </mrow>
                  <mo fence="true" form="postfix" stretchy="false">)</mo>
                </mrow>
                <mn>2</mn>
              </msup>
            </mrow>
            <msup>
              <mrow>
                <mo fence="true" form="prefix" stretchy="false">‖</mo>
                <mrow>
                  <msub>
                    <mi>x</mi>
                    <mi>t</mi>
                  </msub>
                </mrow>
                <mo fence="true" form="postfix" stretchy="false">‖</mo>
              </mrow>
              <mn>2</mn>
            </msup>
          </mrow>
        </mtd>
      </mtr>
    </mtable>
    <annotation encoding="StarMath 5.0">alignc binom{
	ldline w - %eta_{t} nabla F(w) rdline^{2}
	` =` ldline w - {1} over {%lambda t}(%lambda w - Cy_{t}x_{t})  rdline^{2}
	`= ` ldline (1 - 1 over t) w + %eta_{t}Cy_{t}x_{t}  rdline^{2} =`
} {
	`= ` (1 - 1 over t)^{2} ldline w rdline^{2} + 2(1 - 1 over t)%eta_{t}Cy_{t} langle w, %phi(x_{t}) rangle  + (%eta_{t}Cy_{t})^{2} ldline x_{t} rdline^{2} 
} </annotation>
  </semantics>
</math>
</file>

<file path=Object 24/content.xml><?xml version="1.0" encoding="utf-8"?>
<math xmlns="http://www.w3.org/1998/Math/MathML" display="block">
  <semantics>
    <mrow>
      <mrow>
        <mo fence="true" form="prefix" stretchy="false">⟨</mo>
        <mrow>
          <mrow>
            <mi>w</mi>
            <mi>,</mi>
            <mi>ϕ</mi>
            <mrow>
              <mo fence="true" form="prefix" stretchy="false">(</mo>
              <mrow>
                <mi>x</mi>
              </mrow>
              <mo fence="true" form="postfix" stretchy="false">)</mo>
            </mrow>
          </mrow>
        </mrow>
        <mo fence="true" form="postfix" stretchy="false">⟩</mo>
      </mrow>
      <mrow>
        <mspace width="0.5em"/>
        <mo stretchy="false">=</mo>
        <mspace width="0.5em"/>
      </mrow>
      <mrow>
        <mo fence="true" form="prefix" stretchy="false">⟨</mo>
        <mrow>
          <mrow>
            <mrow>
              <munderover>
                <mo stretchy="false">∑</mo>
                <mi>i</mi>
                <mi>m</mi>
              </munderover>
              <msub>
                <mi>α</mi>
                <mi>i</mi>
              </msub>
            </mrow>
            <msub>
              <mi>y</mi>
              <mi>i</mi>
            </msub>
            <mi>ϕ</mi>
            <mrow>
              <mo fence="true" form="prefix" stretchy="false">(</mo>
              <mrow>
                <msub>
                  <mi>x</mi>
                  <mi>i</mi>
                </msub>
              </mrow>
              <mo fence="true" form="postfix" stretchy="false">)</mo>
            </mrow>
            <mi>,</mi>
            <mi>ϕ</mi>
            <mrow>
              <mo fence="true" form="prefix" stretchy="false">(</mo>
              <mrow>
                <mi>x</mi>
              </mrow>
              <mo fence="true" form="postfix" stretchy="false">)</mo>
            </mrow>
          </mrow>
        </mrow>
        <mo fence="true" form="postfix" stretchy="false">⟩</mo>
      </mrow>
      <mrow>
        <mspace width="0.5em"/>
        <mo stretchy="false">=</mo>
        <mspace width="0.5em"/>
      </mrow>
      <mrow>
        <munderover>
          <mo stretchy="false">∑</mo>
          <mi>i</mi>
          <mi>m</mi>
        </munderover>
        <msub>
          <mi>α</mi>
          <mi>i</mi>
        </msub>
      </mrow>
      <msub>
        <mi>y</mi>
        <mi>i</mi>
      </msub>
      <mrow>
        <mo fence="true" form="prefix" stretchy="false">⟨</mo>
        <mrow>
          <mrow>
            <mi>ϕ</mi>
            <mrow>
              <mo fence="true" form="prefix" stretchy="false">(</mo>
              <mrow>
                <msub>
                  <mi>x</mi>
                  <mi>i</mi>
                </msub>
              </mrow>
              <mo fence="true" form="postfix" stretchy="false">)</mo>
            </mrow>
            <mi>,</mi>
            <mi>ϕ</mi>
            <mrow>
              <mo fence="true" form="prefix" stretchy="false">(</mo>
              <mrow>
                <mi>x</mi>
              </mrow>
              <mo fence="true" form="postfix" stretchy="false">)</mo>
            </mrow>
          </mrow>
        </mrow>
        <mo fence="true" form="postfix" stretchy="false">⟩</mo>
      </mrow>
      <mrow>
        <mspace width="0.5em"/>
        <mo stretchy="false">=</mo>
        <mspace width="0.5em"/>
      </mrow>
      <mrow>
        <munderover>
          <mo stretchy="false">∑</mo>
          <mi>i</mi>
          <mi>m</mi>
        </munderover>
        <msub>
          <mi>α</mi>
          <mi>i</mi>
        </msub>
      </mrow>
      <msub>
        <mi>y</mi>
        <mi>i</mi>
      </msub>
      <mi>K</mi>
      <mrow>
        <mo fence="true" form="prefix" stretchy="false">(</mo>
        <mrow>
          <mrow>
            <msub>
              <mi>x</mi>
              <mi>i</mi>
            </msub>
            <mi>,</mi>
            <mi>x</mi>
          </mrow>
        </mrow>
        <mo fence="true" form="postfix" stretchy="false">)</mo>
      </mrow>
    </mrow>
    <annotation encoding="StarMath 5.0">alignc langle w, %phi(x) rangle `=` langle sum from {i} to {m} %alpha_{i}y_{i} %phi(x_{i}), %phi(x) rangle 
`=` sum from {i} to {m} %alpha_{i}y_{i} langle %phi(x_{i}), %phi(x) rangle
`=` sum from {i} to {m} %alpha_{i}y_{i} K(x_{i}, x) </annotation>
  </semantics>
</math>
</file>

<file path=Object 3/content.xml><?xml version="1.0" encoding="utf-8"?>
<math xmlns="http://www.w3.org/1998/Math/MathML" display="block">
  <semantics>
    <mrow>
      <mi>F</mi>
      <mrow>
        <mo fence="true" form="prefix" stretchy="false">(</mo>
        <mrow>
          <mrow>
            <mi>w</mi>
            <mi>,</mi>
            <mi>b</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frac>
          <mn>1</mn>
          <mi>m</mi>
        </mfrac>
      </mrow>
      <mrow>
        <munderover>
          <mo stretchy="false">∑</mo>
          <mrow>
            <mi>i</mi>
            <mo stretchy="false">=</mo>
            <mn>1</mn>
          </mrow>
          <mi>m</mi>
        </munderover>
        <msub>
          <mrow>
            <mo fence="true" form="prefix" stretchy="false">[</mo>
            <mrow>
              <mrow>
                <mrow>
                  <mn>1</mn>
                  <mo stretchy="false">−</mo>
                  <msub>
                    <mi>y</mi>
                    <mi>i</mi>
                  </msub>
                </mrow>
                <mrow>
                  <mo fence="true" form="prefix" stretchy="false">(</mo>
                  <mrow>
                    <mrow>
                      <msup>
                        <mi>w</mi>
                        <mi>T</mi>
                      </msup>
                      <mrow>
                        <msub>
                          <mi>x</mi>
                          <mi>i</mi>
                        </msub>
                        <mo stretchy="false">+</mo>
                        <mi>b</mi>
                      </mrow>
                    </mrow>
                  </mrow>
                  <mo fence="true" form="postfix" stretchy="false">)</mo>
                </mrow>
              </mrow>
            </mrow>
            <mo fence="true" form="postfix" stretchy="false">]</mo>
          </mrow>
          <mtext>+</mtext>
        </msub>
      </mrow>
    </mrow>
    <annotation encoding="StarMath 5.0">F(w, b) `=` frac {%lambda} {2} ldline w rdline^{2} + frac {1} {m} sum from{i = 1} to{m} [1 - y_{i}(w^{T}x_{i} + b)]_{"+"}</annotation>
  </semantics>
</math>
</file>

<file path=Object 4/content.xml><?xml version="1.0" encoding="utf-8"?>
<math xmlns="http://www.w3.org/1998/Math/MathML" display="block">
  <semantics>
    <mrow>
      <mi>w</mi>
      <mspace width="0.5em"/>
      <mo stretchy="false">←</mo>
      <mspace width="0.5em"/>
      <mi>w</mi>
      <mrow>
        <mspace width="2em"/>
        <mo stretchy="false">−</mo>
        <mspace width="2em"/>
      </mrow>
      <mfrac>
        <mn>1</mn>
        <mrow>
          <mi>λ</mi>
          <mi>t</mi>
        </mrow>
      </mfrac>
      <msub>
        <mo stretchy="false">∇</mo>
        <mi>w</mi>
      </msub>
    </mrow>
    <annotation encoding="StarMath 5.0">alignc w `&lt;-`w ~- ~frac {1} {%lambda t} nabla_{w}  </annotation>
  </semantics>
</math>
</file>

<file path=Object 5/content.xml><?xml version="1.0" encoding="utf-8"?>
<math xmlns="http://www.w3.org/1998/Math/MathML" display="block">
  <semantics>
    <mrow>
      <mi>F</mi>
      <mrow>
        <mo fence="true" form="prefix" stretchy="false">(</mo>
        <mrow>
          <mrow>
            <mi>w</mi>
            <mi>,</mi>
            <mi>b</mi>
            <mi>;</mi>
            <mi>i</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sub>
          <mrow>
            <mo fence="true" form="prefix" stretchy="false">[</mo>
            <mrow>
              <mrow>
                <mrow>
                  <mn>1</mn>
                  <mo stretchy="false">−</mo>
                  <msub>
                    <mi>y</mi>
                    <mi>i</mi>
                  </msub>
                </mrow>
                <mrow>
                  <mo fence="true" form="prefix" stretchy="false">(</mo>
                  <mrow>
                    <mrow>
                      <msup>
                        <mi>w</mi>
                        <mi>T</mi>
                      </msup>
                      <mrow>
                        <msub>
                          <mi>x</mi>
                          <mi>i</mi>
                        </msub>
                        <mo stretchy="false">+</mo>
                        <mi>b</mi>
                      </mrow>
                    </mrow>
                  </mrow>
                  <mo fence="true" form="postfix" stretchy="false">)</mo>
                </mrow>
              </mrow>
            </mrow>
            <mo fence="true" form="postfix" stretchy="false">]</mo>
          </mrow>
          <mtext>+</mtext>
        </msub>
      </mrow>
    </mrow>
    <annotation encoding="StarMath 5.0">alignc F(w, b; i) `=` frac {%lambda} {2} ldline w rdline^{2} + [1 - y_{i}(w^{T}x_{i} + b)]_{"+"}</annotation>
  </semantics>
</math>
</file>

<file path=Object 6/content.xml><?xml version="1.0" encoding="utf-8"?>
<math xmlns="http://www.w3.org/1998/Math/MathML" display="block">
  <semantics>
    <mrow>
      <mrow>
        <msub>
          <mo stretchy="false">∇</mo>
          <mi>w</mi>
        </msub>
        <mo stretchy="false">=</mo>
        <mi>λ</mi>
      </mrow>
      <mrow>
        <mi>w</mi>
        <mo stretchy="false">−</mo>
        <mtext>𝕀</mtext>
      </mrow>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sub>
        <mi>y</mi>
        <mi>i</mi>
      </msub>
      <msub>
        <mi>x</mi>
        <mi>i</mi>
      </msub>
    </mrow>
    <annotation encoding="StarMath 5.0">alignc nabla_{w} = %lambda w - "𝕀" [y_{i} (w^{T}x_{i} + b) `&lt;` 1]y_{i}x_{i}</annotation>
  </semantics>
</math>
</file>

<file path=Object 7/content.xml><?xml version="1.0" encoding="utf-8"?>
<math xmlns="http://www.w3.org/1998/Math/MathML" display="block">
  <semantics>
    <mrow>
      <mtext>𝕀</mtext>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row>
    <annotation encoding="StarMath 5.0">alignc "𝕀"[y_{i} (w^{T}x_{i} + b) `&lt;` 1]</annotation>
  </semantics>
</math>
</file>

<file path=Object 8/content.xml><?xml version="1.0" encoding="utf-8"?>
<math xmlns="http://www.w3.org/1998/Math/MathML" display="block">
  <semantics>
    <mrow>
      <mi>F</mi>
      <mrow>
        <mo fence="true" form="prefix" stretchy="false">(</mo>
        <mrow>
          <mrow>
            <mi>w</mi>
            <mi>,</mi>
            <mi>b</mi>
          </mrow>
        </mrow>
        <mo fence="true" form="postfix" stretchy="false">)</mo>
      </mrow>
      <mrow>
        <mspace width="0.5em"/>
        <mo stretchy="false">=</mo>
        <mspace width="0.5em"/>
      </mrow>
      <mfrac>
        <mi>λ</mi>
        <mn>2</mn>
      </mfrac>
      <mrow>
        <msup>
          <mrow>
            <mo fence="true" form="prefix" stretchy="false">‖</mo>
            <mrow>
              <mi>w</mi>
            </mrow>
            <mo fence="true" form="postfix" stretchy="false">‖</mo>
          </mrow>
          <mn>2</mn>
        </msup>
        <mo stretchy="false">+</mo>
        <mfrac>
          <mn>1</mn>
          <mi>m</mi>
        </mfrac>
      </mrow>
      <mrow>
        <munderover>
          <mo stretchy="false">∑</mo>
          <mrow>
            <mi>i</mi>
            <mo stretchy="false">=</mo>
            <mn>1</mn>
          </mrow>
          <mi>m</mi>
        </munderover>
        <mi>log</mi>
      </mrow>
      <mrow>
        <mo fence="true" form="prefix" stretchy="false">(</mo>
        <mrow>
          <mrow>
            <mn>1</mn>
            <mrow>
              <mspace width="0.5em"/>
              <mo stretchy="false">+</mo>
              <mspace width="0.5em"/>
            </mrow>
            <msup>
              <mi mathvariant="normal">e</mi>
              <mrow>
                <mrow>
                  <mo stretchy="false">−</mo>
                  <mi>y</mi>
                </mrow>
                <mrow>
                  <mo fence="true" form="prefix" stretchy="false">(</mo>
                  <mrow>
                    <mrow>
                      <msup>
                        <mi>w</mi>
                        <mi>T</mi>
                      </msup>
                      <mi>x</mi>
                      <mrow>
                        <mspace width="0.5em"/>
                        <mo stretchy="false">+</mo>
                        <mspace width="0.5em"/>
                      </mrow>
                      <mi>b</mi>
                    </mrow>
                  </mrow>
                  <mo fence="true" form="postfix" stretchy="false">)</mo>
                </mrow>
              </mrow>
            </msup>
          </mrow>
        </mrow>
        <mo fence="true" form="postfix" stretchy="false">)</mo>
      </mrow>
    </mrow>
    <annotation encoding="StarMath 5.0">F(w, b) `=` frac {%lambda} {2} ldline w rdline^{2} + frac {1} {m} sum from{i = 1} to{m} log (1 `+ `{func e}^{-y (w^{T}x `+` b)})</annotation>
  </semantics>
</math>
</file>

<file path=Object 9/content.xml><?xml version="1.0" encoding="utf-8"?>
<math xmlns="http://www.w3.org/1998/Math/MathML" display="block">
  <semantics>
    <mrow>
      <mrow>
        <msub>
          <mo stretchy="false">∇</mo>
          <mi>b</mi>
        </msub>
        <mo stretchy="false">=</mo>
        <mrow>
          <mo stretchy="false">−</mo>
          <mtext>𝕀</mtext>
        </mrow>
      </mrow>
      <mrow>
        <mo fence="true" form="prefix" stretchy="false">[</mo>
        <mrow>
          <mrow>
            <msub>
              <mi>y</mi>
              <mi>i</mi>
            </msub>
            <mrow>
              <mo fence="true" form="prefix" stretchy="false">(</mo>
              <mrow>
                <mrow>
                  <msup>
                    <mi>w</mi>
                    <mi>T</mi>
                  </msup>
                  <mrow>
                    <msub>
                      <mi>x</mi>
                      <mi>i</mi>
                    </msub>
                    <mo stretchy="false">+</mo>
                    <mi>b</mi>
                  </mrow>
                </mrow>
              </mrow>
              <mo fence="true" form="postfix" stretchy="false">)</mo>
            </mrow>
            <mrow>
              <mspace width="0.5em"/>
              <mo stretchy="false">&lt;</mo>
              <mspace width="0.5em"/>
            </mrow>
            <mn>1</mn>
          </mrow>
        </mrow>
        <mo fence="true" form="postfix" stretchy="false">]</mo>
      </mrow>
      <msub>
        <mi>y</mi>
        <mi>i</mi>
      </msub>
    </mrow>
    <annotation encoding="StarMath 5.0">alignc nabla_{b} = - "𝕀" [y_{i} (w^{T}x_{i} + b) `&lt;` 1]y_{i}</annotation>
  </semantics>
</math>
</file>