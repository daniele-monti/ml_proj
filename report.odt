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size="20pt" officeooo:rsid="00046c52" officeooo:paragraph-rsid="00046c52" style:font-size-asian="20pt" style:font-size-complex="20pt"/>
    </style:style>
    <style:style style:name="P2" style:family="paragraph" style:parent-style-name="Standard">
      <style:text-properties officeooo:rsid="00046c52" officeooo:paragraph-rsid="00046c52"/>
    </style:style>
    <style:style style:name="P3" style:family="paragraph" style:parent-style-name="Standard">
      <style:paragraph-properties fo:text-align="center" style:justify-single-word="false"/>
      <style:text-properties officeooo:rsid="00046c52" officeooo:paragraph-rsid="0008effe"/>
    </style:style>
    <style:style style:name="P4" style:family="paragraph" style:parent-style-name="Standard">
      <style:paragraph-properties fo:text-align="justify" style:justify-single-word="false"/>
      <style:text-properties officeooo:rsid="00046c52" officeooo:paragraph-rsid="00046c52"/>
    </style:style>
    <style:style style:name="P5" style:family="paragraph" style:parent-style-name="Standard">
      <style:text-properties officeooo:rsid="00046c52" officeooo:paragraph-rsid="001f0f8d"/>
    </style:style>
    <style:style style:name="P6" style:family="paragraph" style:parent-style-name="Standard">
      <style:paragraph-properties fo:text-align="justify" style:justify-single-word="false"/>
      <style:text-properties officeooo:paragraph-rsid="00085d6d"/>
    </style:style>
    <style:style style:name="P7" style:family="paragraph" style:parent-style-name="Standard">
      <style:paragraph-properties fo:text-align="justify" style:justify-single-word="false"/>
      <style:text-properties officeooo:paragraph-rsid="0008eff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a7a34"/>
    </style:style>
    <style:style style:name="P10" style:family="paragraph" style:parent-style-name="Standard">
      <style:paragraph-properties fo:text-align="justify" style:justify-single-word="false"/>
      <style:text-properties officeooo:paragraph-rsid="00106930"/>
    </style:style>
    <style:style style:name="P11" style:family="paragraph" style:parent-style-name="Standard">
      <style:paragraph-properties fo:text-align="justify" style:justify-single-word="false"/>
      <style:text-properties fo:font-size="12pt" fo:font-weight="normal" officeooo:rsid="00046c52" officeooo:paragraph-rsid="00066718" style:font-size-asian="10.5pt" style:font-weight-asian="normal" style:font-size-complex="12pt" style:font-weight-complex="normal"/>
    </style:style>
    <style:style style:name="P12" style:family="paragraph" style:parent-style-name="Standard">
      <style:text-properties fo:font-size="12pt" fo:font-weight="normal" officeooo:rsid="00066718" officeooo:paragraph-rsid="00066718" style:font-size-asian="10.5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83e17" officeooo:paragraph-rsid="00183e1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83e17" officeooo:paragraph-rsid="001f0f8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83e17" officeooo:paragraph-rsid="00183e1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83e17" officeooo:paragraph-rsid="001f0f8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6ce3" officeooo:paragraph-rsid="00186ce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86ce3" officeooo:paragraph-rsid="0020271b"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86ce3" officeooo:paragraph-rsid="0020873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c79f3" officeooo:paragraph-rsid="001dcd8b"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79f3" officeooo:paragraph-rsid="001f0f8d" style:font-size-asian="12pt" style:font-weight-asian="normal" style:font-size-complex="12pt" style:font-weight-complex="normal"/>
    </style:style>
    <style:style style:name="P24" style:family="paragraph" style:parent-style-name="Standard" style:list-style-name="L4">
      <style:paragraph-properties fo:text-align="justify" style:justify-single-word="false"/>
      <style:text-properties fo:font-size="12pt" fo:font-weight="normal" officeooo:rsid="001dcd8b" officeooo:paragraph-rsid="001dcd8b" style:font-size-asian="12pt" style:font-weight-asian="normal" style:font-size-complex="12pt" style:font-weight-complex="normal"/>
    </style:style>
    <style:style style:name="P25" style:family="paragraph" style:parent-style-name="Standard" style:list-style-name="L4">
      <style:paragraph-properties fo:text-align="justify" style:justify-single-word="false"/>
      <style:text-properties fo:font-size="12pt" fo:font-weight="normal" officeooo:rsid="001dcd8b" officeooo:paragraph-rsid="001f0f8d" style:font-size-asian="12pt" style:font-weight-asian="normal" style:font-size-complex="12pt" style:font-weight-complex="normal"/>
    </style:style>
    <style:style style:name="P26" style:family="paragraph" style:parent-style-name="Standard" style:list-style-name="L4">
      <style:paragraph-properties fo:text-align="justify" style:justify-single-word="false"/>
      <style:text-properties fo:font-size="12pt" fo:font-weight="normal" officeooo:rsid="001ea2fb" officeooo:paragraph-rsid="001ea2fb" style:font-size-asian="12pt" style:font-weight-asian="normal" style:font-size-complex="12pt" style:font-weight-complex="normal"/>
    </style:style>
    <style:style style:name="P27" style:family="paragraph" style:parent-style-name="Standard" style:list-style-name="L4">
      <style:paragraph-properties fo:text-align="justify" style:justify-single-word="false"/>
      <style:text-properties fo:font-size="12pt" fo:font-weight="normal" officeooo:rsid="001ea2fb" officeooo:paragraph-rsid="001f0f8d" style:font-size-asian="12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fo:font-size="12pt" fo:font-style="normal" style:text-underline-style="none" fo:font-weight="normal" officeooo:rsid="001dcd8b" officeooo:paragraph-rsid="001dcd8b" style:font-size-asian="12pt" style:font-style-asian="normal" style:font-weight-asian="normal" style:font-size-complex="12pt" style:font-style-complex="normal" style:font-weight-complex="normal"/>
    </style:style>
    <style:style style:name="P29" style:family="paragraph" style:parent-style-name="Standard" style:list-style-name="L4">
      <style:paragraph-properties fo:text-align="justify" style:justify-single-word="false"/>
      <style:text-properties fo:font-size="12pt" fo:font-style="normal" style:text-underline-style="none" fo:font-weight="normal" officeooo:rsid="001dcd8b" officeooo:paragraph-rsid="001f0f8d" style:font-size-asian="12pt" style:font-style-asian="normal" style:font-weight-asian="normal" style:font-size-complex="12pt" style:font-style-complex="normal" style:font-weight-complex="normal"/>
    </style:style>
    <style:style style:name="P30" style:family="paragraph" style:parent-style-name="Standard" style:list-style-name="L4">
      <style:paragraph-properties fo:text-align="justify" style:justify-single-word="false"/>
      <style:text-properties fo:font-size="12pt" fo:font-style="normal" style:text-underline-style="none" fo:font-weight="normal" officeooo:rsid="001e161b" officeooo:paragraph-rsid="001e161b" style:font-size-asian="12pt" style:font-style-asian="normal" style:font-weight-asian="normal" style:font-size-complex="12pt" style:font-style-complex="normal" style:font-weight-complex="normal"/>
    </style:style>
    <style:style style:name="P31" style:family="paragraph" style:parent-style-name="Standard" style:list-style-name="L4">
      <style:paragraph-properties fo:text-align="justify" style:justify-single-word="false"/>
      <style:text-properties fo:font-size="12pt" fo:font-style="normal" style:text-underline-style="none" fo:font-weight="normal" officeooo:rsid="001e161b" officeooo:paragraph-rsid="001f0f8d" style:font-size-asian="12pt" style:font-style-asian="normal" style:font-weight-asian="normal" style:font-size-complex="12pt" style:font-style-complex="normal" style:font-weight-complex="normal"/>
    </style:style>
    <style:style style:name="P32" style:family="paragraph" style:parent-style-name="Standard">
      <style:text-properties fo:font-size="11pt" officeooo:rsid="00046c52" officeooo:paragraph-rsid="0016c9f9" style:font-size-asian="11pt" style:font-size-complex="11pt"/>
    </style:style>
    <style:style style:name="P33"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46c52" officeooo:paragraph-rsid="00046c52" style:font-size-asian="16pt" style:font-weight-asian="bold" style:font-size-complex="16pt" style:font-weight-complex="bold"/>
    </style:style>
    <style:style style:name="P34"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5d6d" officeooo:paragraph-rsid="00085d6d" style:font-size-asian="16pt" style:font-weight-asian="bold" style:font-size-complex="16pt" style:font-weight-complex="bold"/>
    </style:style>
    <style:style style:name="P35"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effe" officeooo:paragraph-rsid="0008effe" style:font-size-asian="16pt" style:font-weight-asian="bold" style:font-size-complex="16pt" style:font-weight-complex="bold"/>
    </style:style>
    <style:style style:name="P36" style:family="paragraph" style:parent-style-name="Standard">
      <style:text-properties style:font-name="Liberation Sans" fo:font-size="14pt" fo:font-weight="normal" officeooo:rsid="00183e17" officeooo:paragraph-rsid="00183e17" style:font-size-asian="14pt" style:font-weight-asian="normal" style:font-size-complex="14pt" style:font-weight-complex="normal"/>
    </style:style>
    <style:style style:name="P37" style:family="paragraph" style:parent-style-name="Standard">
      <style:text-properties style:font-name="Liberation Sans" fo:font-size="14pt" fo:font-weight="normal" officeooo:rsid="001f0f8d" officeooo:paragraph-rsid="001f0f8d" style:font-size-asian="14pt" style:font-weight-asian="normal" style:font-size-complex="14pt" style:font-weight-complex="normal"/>
    </style:style>
    <style:style style:name="P38" style:family="paragraph" style:parent-style-name="Standard">
      <style:paragraph-properties fo:text-align="center" style:justify-single-word="false"/>
    </style:style>
    <style:style style:name="P39" style:family="paragraph" style:parent-style-name="Standard">
      <style:paragraph-properties fo:text-align="justify" style:justify-single-word="false"/>
      <style:text-properties officeooo:rsid="000b6cdc" officeooo:paragraph-rsid="000b6cdc"/>
    </style:style>
    <style:style style:name="P40" style:family="paragraph" style:parent-style-name="Standard">
      <style:paragraph-properties fo:text-align="justify" style:justify-single-word="false"/>
      <style:text-properties officeooo:rsid="000fe15c" officeooo:paragraph-rsid="000fe15c"/>
    </style:style>
    <style:style style:name="P41" style:family="paragraph" style:parent-style-name="Standard" style:list-style-name="L2">
      <style:paragraph-properties fo:text-align="justify" style:justify-single-word="false"/>
      <style:text-properties officeooo:rsid="000fe15c" officeooo:paragraph-rsid="000fe15c"/>
    </style:style>
    <style:style style:name="P42" style:family="paragraph" style:parent-style-name="Standard">
      <style:paragraph-properties fo:text-align="justify" style:justify-single-word="false"/>
      <style:text-properties officeooo:rsid="00106930" officeooo:paragraph-rsid="00106930"/>
    </style:style>
    <style:style style:name="P43" style:family="paragraph" style:parent-style-name="Standard">
      <style:text-properties officeooo:rsid="00106930" officeooo:paragraph-rsid="00106930"/>
    </style:style>
    <style:style style:name="P44" style:family="paragraph" style:parent-style-name="Standard" style:list-style-name="L3">
      <style:text-properties officeooo:rsid="00106930" officeooo:paragraph-rsid="00106930"/>
    </style:style>
    <style:style style:name="P45" style:family="paragraph" style:parent-style-name="Standard">
      <style:text-properties officeooo:rsid="00111105" officeooo:paragraph-rsid="00111105"/>
    </style:style>
    <style:style style:name="P46" style:family="paragraph" style:parent-style-name="Standard">
      <style:paragraph-properties fo:text-align="center" style:justify-single-word="false"/>
      <style:text-properties officeooo:rsid="00111105" officeooo:paragraph-rsid="00111105"/>
    </style:style>
    <style:style style:name="P47" style:family="paragraph" style:parent-style-name="Standard">
      <style:paragraph-properties fo:text-align="center" style:justify-single-word="false"/>
      <style:text-properties officeooo:rsid="00111105" officeooo:paragraph-rsid="0013a5b3"/>
    </style:style>
    <style:style style:name="P48" style:family="paragraph" style:parent-style-name="Standard">
      <style:paragraph-properties fo:text-align="justify" style:justify-single-word="false"/>
      <style:text-properties officeooo:rsid="00111105" officeooo:paragraph-rsid="00111105"/>
    </style:style>
    <style:style style:name="P49" style:family="paragraph" style:parent-style-name="Standard">
      <style:paragraph-properties fo:text-align="justify" style:justify-single-word="false"/>
      <style:text-properties officeooo:rsid="00111105" officeooo:paragraph-rsid="0013a5b3"/>
    </style:style>
    <style:style style:name="P50" style:family="paragraph" style:parent-style-name="Standard">
      <style:text-properties fo:font-size="6pt" officeooo:rsid="00111105" officeooo:paragraph-rsid="00111105" style:font-size-asian="5.25pt" style:font-size-complex="6pt"/>
    </style:style>
    <style:style style:name="P51" style:family="paragraph" style:parent-style-name="Standard">
      <style:paragraph-properties fo:text-align="center" style:justify-single-word="false"/>
      <style:text-properties fo:font-size="6pt" officeooo:rsid="00111105" officeooo:paragraph-rsid="00111105" style:font-size-asian="5.25pt" style:font-size-complex="6pt"/>
    </style:style>
    <style:style style:name="P52" style:family="paragraph" style:parent-style-name="Standard">
      <style:paragraph-properties fo:text-align="center" style:justify-single-word="false"/>
      <style:text-properties fo:font-size="6pt" officeooo:rsid="00111105" officeooo:paragraph-rsid="0013a5b3" style:font-size-asian="5.25pt" style:font-size-complex="6pt"/>
    </style:style>
    <style:style style:name="P53" style:family="paragraph" style:parent-style-name="Standard">
      <style:text-properties fo:font-size="6pt" fo:font-weight="normal" officeooo:rsid="00183e17" officeooo:paragraph-rsid="00183e17" style:font-size-asian="5.25pt" style:font-weight-asian="normal" style:font-size-complex="6pt" style:font-weight-complex="normal"/>
    </style:style>
    <style:style style:name="P54" style:family="paragraph" style:parent-style-name="Standard">
      <style:paragraph-properties fo:text-align="center" style:justify-single-word="false"/>
      <style:text-properties fo:font-size="6pt" fo:font-weight="normal" officeooo:rsid="00183e17" officeooo:paragraph-rsid="00183e17" style:font-size-asian="5.25pt" style:font-weight-asian="normal" style:font-size-complex="6pt" style:font-weight-complex="normal"/>
    </style:style>
    <style:style style:name="P55" style:family="paragraph" style:parent-style-name="Standard">
      <style:paragraph-properties fo:text-align="center" style:justify-single-word="false"/>
      <style:text-properties fo:font-size="6pt" fo:font-weight="normal" officeooo:rsid="00183e17" officeooo:paragraph-rsid="001f0f8d" style:font-size-asian="5.25pt" style:font-weight-asian="normal" style:font-size-complex="6pt" style:font-weight-complex="normal"/>
    </style:style>
    <style:style style:name="P56" style:family="paragraph" style:parent-style-name="Standard">
      <style:text-properties fo:font-size="6pt" fo:font-weight="normal" officeooo:rsid="00183e17" officeooo:paragraph-rsid="001f0f8d" style:font-size-asian="5.25pt" style:font-weight-asian="normal" style:font-size-complex="6pt" style:font-weight-complex="normal"/>
    </style:style>
    <style:style style:name="P57" style:family="paragraph" style:parent-style-name="Standard">
      <style:paragraph-properties fo:text-align="justify" style:justify-single-word="false"/>
      <style:text-properties fo:font-size="6pt" fo:font-weight="normal" officeooo:rsid="001c79f3" officeooo:paragraph-rsid="001dcd8b" style:font-size-asian="5.25pt" style:font-weight-asian="normal" style:font-size-complex="6pt" style:font-weight-complex="normal"/>
    </style:style>
    <style:style style:name="P58" style:family="paragraph" style:parent-style-name="Standard">
      <style:paragraph-properties fo:text-align="justify" style:justify-single-word="false"/>
      <style:text-properties fo:font-size="6pt" fo:font-weight="normal" officeooo:rsid="001c79f3" officeooo:paragraph-rsid="001f0f8d" style:font-size-asian="5.25pt" style:font-weight-asian="normal" style:font-size-complex="6pt" style:font-weight-complex="normal"/>
    </style:style>
    <style:style style:name="P59" style:family="paragraph" style:parent-style-name="Standard">
      <style:paragraph-properties fo:text-align="justify" style:justify-single-word="false"/>
      <style:text-properties officeooo:rsid="0013a5b3" officeooo:paragraph-rsid="0013a5b3"/>
    </style:style>
    <style:style style:name="P60" style:family="paragraph" style:parent-style-name="Standard">
      <style:paragraph-properties fo:text-align="justify" style:justify-single-word="false"/>
      <style:text-properties officeooo:rsid="00143d92" officeooo:paragraph-rsid="00143d92"/>
    </style:style>
    <style:style style:name="P61" style:family="paragraph" style:parent-style-name="Standard">
      <style:paragraph-properties fo:text-align="justify" style:justify-single-word="false"/>
      <style:text-properties officeooo:rsid="00143d92" officeooo:paragraph-rsid="00158149"/>
    </style:style>
    <style:style style:name="P62" style:family="paragraph" style:parent-style-name="Standard">
      <style:paragraph-properties fo:text-align="justify" style:justify-single-word="false"/>
      <style:text-properties officeooo:rsid="00158149" officeooo:paragraph-rsid="00158149"/>
    </style:style>
    <style:style style:name="P63" style:family="paragraph" style:parent-style-name="Standard">
      <style:text-properties officeooo:rsid="00158149" officeooo:paragraph-rsid="00158149"/>
    </style:style>
    <style:style style:name="P64" style:family="paragraph" style:parent-style-name="Standard">
      <style:text-properties officeooo:paragraph-rsid="0016c9f9"/>
    </style:style>
    <style:style style:name="P65" style:family="paragraph" style:parent-style-name="Standard">
      <style:text-properties officeooo:rsid="001ea2fb" officeooo:paragraph-rsid="001ea2fb"/>
    </style:style>
    <style:style style:name="P66" style:family="paragraph" style:parent-style-name="Standard">
      <style:text-properties officeooo:rsid="001ea2fb" officeooo:paragraph-rsid="001f0f8d"/>
    </style:style>
    <style:style style:name="P67" style:family="paragraph" style:parent-style-name="Text_20_body">
      <style:text-properties fo:font-size="10pt" fo:language="it" fo:country="IT" officeooo:rsid="00238e65" officeooo:paragraph-rsid="00106930" style:font-size-asian="10pt" style:font-size-complex="10pt"/>
    </style:style>
    <style:style style:name="T1" style:family="text">
      <style:text-properties fo:font-size="14pt" style:font-size-asian="14pt" style:font-size-complex="14pt"/>
    </style:style>
    <style:style style:name="T2" style:family="text">
      <style:text-properties fo:font-size="14pt" officeooo:rsid="00158149" style:font-size-asian="14pt" style:font-size-complex="14pt"/>
    </style:style>
    <style:style style:name="T3" style:family="text">
      <style:text-properties officeooo:rsid="00066718"/>
    </style:style>
    <style:style style:name="T4" style:family="text">
      <style:text-properties officeooo:rsid="00085d6d"/>
    </style:style>
    <style:style style:name="T5" style:family="text">
      <style:text-properties officeooo:rsid="0008effe"/>
    </style:style>
    <style:style style:name="T6" style:family="text">
      <style:text-properties fo:font-style="italic" style:font-style-asian="italic" style:font-style-complex="italic"/>
    </style:style>
    <style:style style:name="T7" style:family="text">
      <style:text-properties fo:font-style="italic" officeooo:rsid="0013b10a" style:font-style-asian="italic" style:font-style-complex="italic"/>
    </style:style>
    <style:style style:name="T8" style:family="text">
      <style:text-properties fo:font-style="italic" officeooo:rsid="001c79f3" style:font-style-asian="italic" style:font-style-complex="italic"/>
    </style:style>
    <style:style style:name="T9" style:family="text">
      <style:text-properties fo:font-size="10pt" style:font-size-asian="10pt" style:font-size-complex="10pt"/>
    </style:style>
    <style:style style:name="T10" style:family="text">
      <style:text-properties fo:font-size="10pt" officeooo:rsid="0008effe" style:font-size-asian="10pt" style:font-size-complex="10pt"/>
    </style:style>
    <style:style style:name="T11" style:family="text">
      <style:text-properties fo:font-size="10pt" officeooo:rsid="00158149" style:font-size-asian="10pt" style:font-size-complex="10pt"/>
    </style:style>
    <style:style style:name="T12" style:family="text">
      <style:text-properties fo:font-size="10pt" officeooo:rsid="0016c9f9" style:font-size-asian="10pt" style:font-size-complex="10pt"/>
    </style:style>
    <style:style style:name="T13" style:family="text">
      <style:text-properties fo:font-size="10pt" fo:font-style="italic" style:font-size-asian="10pt" style:font-size-complex="10pt"/>
    </style:style>
    <style:style style:name="T14" style:family="text">
      <style:text-properties fo:font-size="10pt" fo:font-style="italic" officeooo:rsid="0008effe" style:font-size-asian="10pt" style:font-style-asian="italic" style:font-size-complex="10pt" style:font-style-complex="italic"/>
    </style:style>
    <style:style style:name="T15" style:family="text">
      <style:text-properties fo:font-size="10pt" fo:font-weight="bold" style:font-size-asian="10pt" style:font-size-complex="10pt"/>
    </style:style>
    <style:style style:name="T16" style:family="text">
      <style:text-properties officeooo:rsid="000a7a34"/>
    </style:style>
    <style:style style:name="T17" style:family="text">
      <style:text-properties officeooo:rsid="000b6cdc"/>
    </style:style>
    <style:style style:name="T18" style:family="text">
      <style:text-properties officeooo:rsid="000e839d"/>
    </style:style>
    <style:style style:name="T19" style:family="text">
      <style:text-properties officeooo:rsid="00106930"/>
    </style:style>
    <style:style style:name="T20" style:family="text">
      <style:text-properties officeooo:rsid="00111105"/>
    </style:style>
    <style:style style:name="T21" style:family="text">
      <style:text-properties style:font-name="Liberation Serif" fo:font-style="italic" style:font-style-asian="italic" style:font-style-complex="italic"/>
    </style:style>
    <style:style style:name="T22" style:family="text">
      <style:text-properties style:font-name="Liberation Serif" fo:font-style="italic" officeooo:rsid="00111105" style:font-style-asian="italic" style:font-style-complex="italic"/>
    </style:style>
    <style:style style:name="T23" style:family="text">
      <style:text-properties style:font-name="Liberation Serif" fo:font-style="italic" officeooo:rsid="00186ce3" style:font-style-asian="italic" style:font-style-complex="italic"/>
    </style:style>
    <style:style style:name="T24" style:family="text">
      <style:text-properties style:font-name="Liberation Serif" fo:font-style="normal" style:font-style-asian="normal" style:font-style-complex="normal"/>
    </style:style>
    <style:style style:name="T25" style:family="text">
      <style:text-properties style:font-name="Liberation Serif" fo:font-style="normal" officeooo:rsid="0011b4de" style:font-style-asian="normal" style:font-style-complex="normal"/>
    </style:style>
    <style:style style:name="T26" style:family="text">
      <style:text-properties style:font-name="Liberation Serif" fo:font-style="normal" officeooo:rsid="0013a5b3" style:font-style-asian="normal" style:font-style-complex="normal"/>
    </style:style>
    <style:style style:name="T27" style:family="text">
      <style:text-properties style:font-name="Liberation Serif" fo:font-style="normal" officeooo:rsid="0013b10a" style:font-style-asian="normal" style:font-style-complex="normal"/>
    </style:style>
    <style:style style:name="T28" style:family="text">
      <style:text-properties style:font-name="Liberation Serif" fo:font-style="normal" officeooo:rsid="00158149" style:font-style-asian="normal" style:font-style-complex="normal"/>
    </style:style>
    <style:style style:name="T29" style:family="text">
      <style:text-properties style:font-name="Liberation Serif" fo:font-style="normal" officeooo:rsid="00111105" style:font-style-asian="normal" style:font-style-complex="normal"/>
    </style:style>
    <style:style style:name="T30" style:family="text">
      <style:text-properties style:font-name="Liberation Serif" style:font-name-asian="Liberation Serif" style:font-name-complex="Liberation Serif"/>
    </style:style>
    <style:style style:name="T31" style:family="text">
      <style:text-properties style:font-name="Liberation Serif" officeooo:rsid="0019d913" style:font-name-asian="Liberation Serif" style:font-name-complex="Liberation Serif"/>
    </style:style>
    <style:style style:name="T32" style:family="text">
      <style:text-properties style:font-name="Liberation Serif" officeooo:rsid="0020271b"/>
    </style:style>
    <style:style style:name="T33" style:family="text">
      <style:text-properties style:font-name="Liberation Serif1" officeooo:rsid="00186ce3"/>
    </style:style>
    <style:style style:name="T34" style:family="text">
      <style:text-properties style:font-name="Liberation Serif1" fo:font-style="italic" officeooo:rsid="00186ce3" style:font-style-asian="italic" style:font-style-complex="italic"/>
    </style:style>
    <style:style style:name="T35" style:family="text">
      <style:text-properties style:font-name="Liberation Serif1" style:font-name-asian="Noto Serif CJK SC" style:font-name-complex="Lohit Devanagari1"/>
    </style:style>
    <style:style style:name="T36" style:family="text">
      <style:text-properties style:font-name="Liberation Serif1" officeooo:rsid="0019d913"/>
    </style:style>
    <style:style style:name="T37" style:family="text">
      <style:text-properties fo:font-style="normal" officeooo:rsid="0013b10a" style:font-style-asian="normal" style:font-style-complex="normal"/>
    </style:style>
    <style:style style:name="T38" style:family="text">
      <style:text-properties style:text-position="super 58%"/>
    </style:style>
    <style:style style:name="T39" style:family="text">
      <style:text-properties style:text-position="0% 100%"/>
    </style:style>
    <style:style style:name="T40" style:family="text">
      <style:text-properties style:text-position="0% 100%" officeooo:rsid="0019d913"/>
    </style:style>
    <style:style style:name="T41" style:family="text">
      <style:text-properties style:text-position="0% 100%" style:font-name="Liberation Serif1"/>
    </style:style>
    <style:style style:name="T42" style:family="text">
      <style:text-properties style:text-position="0% 100%" style:font-name="Liberation Serif1" officeooo:rsid="0019d913"/>
    </style:style>
    <style:style style:name="T43" style:family="text">
      <style:text-properties style:text-position="0% 100%" style:font-name="Liberation Serif1" officeooo:rsid="001dcd8b"/>
    </style:style>
    <style:style style:name="T44" style:family="text">
      <style:text-properties style:text-position="0% 100%" style:font-name="Liberation Serif1" fo:font-style="italic" officeooo:rsid="001ea2fb" style:font-style-asian="italic" style:font-style-complex="italic"/>
    </style:style>
    <style:style style:name="T45" style:family="text">
      <style:text-properties style:text-position="0% 100%" style:font-name="Liberation Serif1" officeooo:rsid="001c79f3"/>
    </style:style>
    <style:style style:name="T46" style:family="text">
      <style:text-properties style:text-position="0% 100%" style:font-name="Liberation Serif1" fo:font-style="normal" style:text-underline-style="none" style:font-style-asian="normal" style:font-style-complex="normal"/>
    </style:style>
    <style:style style:name="T47" style:family="text">
      <style:text-properties style:text-position="0% 100%" style:font-name="Liberation Serif1" officeooo:rsid="001ea2fb"/>
    </style:style>
    <style:style style:name="T48" style:family="text">
      <style:text-properties style:text-position="0% 100%" style:font-name="Liberation Serif1" officeooo:rsid="0020271b"/>
    </style:style>
    <style:style style:name="T49" style:family="text">
      <style:text-properties style:text-position="0% 100%" officeooo:rsid="0020271b"/>
    </style:style>
    <style:style style:name="T50" style:family="text">
      <style:text-properties style:text-position="0% 100%" style:font-name="Liberation Serif" officeooo:rsid="0020271b"/>
    </style:style>
    <style:style style:name="T51" style:family="text">
      <style:text-properties style:text-position="sub 58%" style:font-name="Liberation Serif1" officeooo:rsid="0019d913"/>
    </style:style>
    <style:style style:name="T52" style:family="text">
      <style:text-properties officeooo:rsid="001a18fd"/>
    </style:style>
    <style:style style:name="T53" style:family="text">
      <style:text-properties style:text-underline-style="solid" style:text-underline-width="auto" style:text-underline-color="font-color" officeooo:rsid="001a18fd"/>
    </style:style>
    <style:style style:name="T54" style:family="text">
      <style:text-properties officeooo:rsid="001c79f3"/>
    </style:style>
    <style:style style:name="T55" style:family="text">
      <style:text-properties officeooo:rsid="001dcd8b"/>
    </style:style>
    <style:style style:name="T56" style:family="text">
      <style:text-properties officeooo:rsid="0020271b"/>
    </style:style>
    <style:style style:name="fr1" style:family="graphic" style:parent-style-name="Formula">
      <style:graphic-properties fo:margin-left="0in" fo:margin-right="0in" style:wrap="parallel" style:number-wrapped-paragraphs="no-limit" style:wrap-contour="false" style:vertical-pos="from-top" draw:wrap-influence-on-position="once-concurrent" loext:allow-overlap="true"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3"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text:bookmark text:name="h.kvcdr2afmpk"/>SVM &amp; Logistic Regression for Wine-Quality Prediction</text:h>
      <text:p text:style-name="P3"><text:tab/></text:p>
      <text:p text:style-name="P3"><text:span text:style-name="T2">P</text:span><text:span text:style-name="T1">roject for the course Statistical </text:span><text:span text:style-name="T2">M</text:span><text:span text:style-name="T1">ethod</text:span><text:span text:style-name="T2">s</text:span><text:span text:style-name="T1"> for Machine Learning at Univerità degli Studi di Milano</text:span></text:p>
      <text:p text:style-name="P2"/>
      <text:p text:style-name="P2"/>
      <text:p text:style-name="P2"><text:span text:style-name="T1">Author: Daniele Monti</text:span></text:p>
      <text:p text:style-name="P2"/>
      <text:p text:style-name="P2"/>
      <text:p text:style-name="P4">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are grave and serious offences in the university and accept the penalties that would be imposed should I engage in plagiarism, collusion or copying. This assignment, or any part of it, has not been previously submitted by me or any other person for assessment on this or any other course of study.</text:p>
      <text:p text:style-name="P4"/>
      <text:p text:style-name="P4"/>
      <text:p text:style-name="P2"/>
      <text:p text:style-name="P33">Environment</text:p>
      <text:p text:style-name="P11">The project uses a tool called uv to manage Python packages. Instructions on how to install this software can be found at <text:a xlink:type="simple" xlink:href="https://docs.astral.sh/uv/getting-started/installation/" text:style-name="Internet_20_link" text:visited-style-name="Visited_20_Internet_20_Link">https://docs.astral.sh/uv/getting-started/installation/</text:a>.</text:p>
      <text:p text:style-name="P11"><text:span text:style-name="T3">Once uv is installed, the environment can be reproduced by following these simple steps:</text:span></text:p>
      <text:list xml:id="list2474226076" text:style-name="L1">
        <text:list-item>
          <text:p text:style-name="P13">navigate to the project’s folder</text:p>
        </text:list-item>
        <text:list-item>
          <text:p text:style-name="P13">run the command “uv sync”</text:p>
        </text:list-item>
        <text:list-item>
          <text:p text:style-name="P13">activate the python virtual environment situated in the folder .venv</text:p>
        </text:list-item>
      </text:list>
      <text:p text:style-name="P14">To execute a python script, use the command “uv run script_name.py”</text:p>
      <text:p text:style-name="P12"/>
      <text:p text:style-name="P12"/>
      <text:p text:style-name="P34">Exploratory Data Analysis</text:p>
      <text:p text:style-name="P4">Exploratory data analysis <text:span text:style-name="T4">was conducted within the jupyter notebook ‘data_analysis.ipynb’. There are 11 features, and the dataset contains a total of 6497 records, none of which contains a null value; missing data treatment is therefore unnecessary.</text:span></text:p>
      <text:p text:style-name="P4"/>
      <text:p text:style-name="P6"><text:span text:style-name="T4">The quality has been transformed into a binary class as per instructions: quality greater or equal to 6 corresponds to the positive class, identified by the value 1, quality less than 6 corresponds to the negative class, identified by the value -1. The two classes thus formed are somewhat imbalanced, with the positive class comprising the 63.31% of the total and the negative comprising of the 36.69%. </text:span><text:span text:style-name="T5">This issue will be addressed in the section on preprocessing.</text:span></text:p>
      <text:p text:style-name="P6"/>
      <text:p text:style-name="P7"><text:span text:style-name="T5">There are 993 records which are present more than once, and a handful which appear as high as 8 or 7 times. This is not a result of the transformation of the quality into a binary class, as the same counts apply also for the non-transformed dataset. </text:span>According to the research paper <text:span text:style-name="T5">[1]</text:span> by the original creators of the dataset:</text:p>
      <text:p text:style-name="P38"><text:s/>“The data were recorded by a computerized system (iLab), which automatically manages the process of wine sample testing from producer requests to laboratory and sensory analysis. Each entry denotes a given test (analytical or sensory) [...]”</text:p>
      <text:p text:style-name="Standard"><text:soft-page-break/>They also say:</text:p>
      <text:p text:style-name="P38">“During the preprocessing stage, the database was transformed in order to include a distinct wine sample (with all tests) per row.”,</text:p>
      <text:p text:style-name="Standard"/>
      <text:p text:style-name="P9">which leads me to the conclusion that rows with the exact same feature values corresponds to different taste tests rather than to different wines samples that happen to have the same feature values. If this is the case, it is surprising that in all of such cases, each taste test resulted in the same quality evaluation from the experts, but since the original authors decided to use the dataset without dropping the duplicated rows, I will do the same.</text:p>
      <text:p text:style-name="P9"><text:span text:style-name="T16">There is also an argument to be made that keeping the duplicated records better represents the underlying unknown distribution of the data, so dropping the records would be detrimental. At the same time, it is quite possible that some records seen during training will also be seen during testing, which is not desirable. This could be avoided by assigning a weight to each record proportional to the number of times it appears in the dataset and then eliminating the duplicates, but I did not want to overcomplicate the project.</text:span></text:p>
      <text:p text:style-name="P6"/>
      <text:p text:style-name="P10"><text:span text:style-name="T17">Univariate distribution analysis shows that all of the features are approximately normally distributed, with </text:span><text:span text:style-name="T20">several</text:span><text:span text:style-name="T17"> having a light skew (e.g. ‘volatile acidity’, ‘residual sugar’, ‘</text:span><text:span text:style-name="T18">alcohol’</text:span><text:span text:style-name="T17">). </text:span><text:span text:style-name="T18">Some features, namely ‘free sulfur dioxide’, ‘</text:span>volatile acidity’, ‘citric acid’, ‘residual sugar’, ‘chlorides’, ‘total sulfur dioxide’ <text:span text:style-name="T18">and ‘</text:span>density’ <text:span text:style-name="T18">present several extreme outliers, for a total of 14 records affected. </text:span><text:span text:style-name="T19">All the other features present a few (as is the case for ‘alcohol’ or ‘total sulfur dioxide’) or many milder outliers (as in the case of all the remaining features). E</text:span><text:span text:style-name="T18">xtreme outliers have been treated the same as every other during the preprocessing stage, though maybe it would be beneficial to outright remove them from the dataset.</text:span></text:p>
      <text:p text:style-name="P8"/>
      <text:p text:style-name="P40">Bivariate analysis shows that there are no extremely strong linear correlations between features, and there are only two cases where there is a relatively strong linear correlation, which are, unsurprisingly:</text:p>
      <text:list xml:id="list1706666186" text:style-name="L2">
        <text:list-item>
          <text:p text:style-name="P41">positive, between ‘total sulfur dioxide’ and ‘free sulfur dioxide’</text:p>
        </text:list-item>
        <text:list-item>
          <text:p text:style-name="P41">negative, between ‘alcohol’ and ‘density’</text:p>
        </text:list-item>
      </text:list>
      <text:p text:style-name="P42">In all other cases, the correlation coefficient is smaller than 0.54 in absolute value.</text:p>
      <text:p text:style-name="P39"/>
      <text:p text:style-name="P6"/>
      <text:p text:style-name="P34">Preprocessing</text:p>
      <text:p text:style-name="P43">The preprocessing utilities are inside the file ‘preprocessing.py’. They serve as to solve three main problems:</text:p>
      <text:list xml:id="list3223216994" text:style-name="L3">
        <text:list-item>
          <text:p text:style-name="P44">outlier treatment</text:p>
        </text:list-item>
        <text:list-item>
          <text:p text:style-name="P44">scaling</text:p>
        </text:list-item>
        <text:list-item>
          <text:p text:style-name="P44">imbalance treatment</text:p>
        </text:list-item>
      </text:list>
      <text:p text:style-name="P43"/>
      <text:p text:style-name="P45">For every feature, a value <text:span text:style-name="T6">x</text:span> is considered an outlier if:</text:p>
      <text:p text:style-name="P50"/>
      <text:p text:style-name="P46"><draw:frame draw:style-name="fr3" draw:name="Object1" text:anchor-type="as-char" svg:y="-0.1484in" svg:width="2.0902in" svg:height="0.1902in" draw:z-index="0"><draw:object xlink:href="./Object 1" xlink:type="simple" xlink:show="embed" xlink:actuate="onLoad"/><draw:image xlink:href="./ObjectReplacements/Object 1" xlink:type="simple" xlink:show="embed" xlink:actuate="onLoad"/></draw:frame></text:p>
      <text:p text:style-name="P51"/>
      <text:p text:style-name="P48">where <text:span text:style-name="T21">μ </text:span><text:span text:style-name="T24">is that feature’s mean and </text:span><text:span text:style-name="T21">σ </text:span><text:span text:style-name="T24">is that feature’s standard deviation. </text:span><text:span text:style-name="T26">Any outlier value is then clipped to the lower or upper value. </text:span><text:span text:style-name="T24">I chose this definition over the IQR based definition because </text:span><text:span text:style-name="T25">many features have a rather long skew tail which </text:span><text:span text:style-name="T26">is formed by a non indifferent number of records that would be cut short, accumulating too many records at the cutting point.</text:span></text:p>
      <text:p text:style-name="P4"/>
      <text:p text:style-name="P59">Each feature is scaled using scikit-learn StandardScaler, which applies the following transformation:</text:p>
      <text:p text:style-name="P47"><text:soft-page-break/><draw:frame draw:style-name="fr3" draw:name="Object2" text:anchor-type="as-char" svg:y="-0.25in" svg:width="0.8917in" svg:height="0.3984in" draw:z-index="1"><draw:object xlink:href="./Object 2" xlink:type="simple" xlink:show="embed" xlink:actuate="onLoad"/><draw:image xlink:href="./ObjectReplacements/Object 2" xlink:type="simple" xlink:show="embed" xlink:actuate="onLoad"/><svg:desc>formula</svg:desc></draw:frame></text:p>
      <text:p text:style-name="P52"/>
      <text:p text:style-name="P49">where <text:span text:style-name="T7">x</text:span><text:span text:style-name="T37"> is the value of the feature before scaling, </text:span><text:span text:style-name="T21">μ </text:span><text:span text:style-name="T24">is that feature’s mean and </text:span><text:span text:style-name="T21">σ </text:span><text:span text:style-name="T24">is that feature’s standard deviation. </text:span><text:span text:style-name="T27">This shifts the data into a normal distribution of unit variance and zero mean. Scaling feature is particularly important for learning a linear classifier, because otherwise a feature with a bigger scale would be given more importance by the model weights.</text:span></text:p>
      <text:p text:style-name="P49"><text:span text:style-name="T27"/></text:p>
      <text:p text:style-name="P60"><text:span text:style-name="T27">F</text:span><text:span text:style-name="T24">inally, as already mentioned, the dataset is moderately unbalanced towards the positive class. In order to help the model learn to better classify the negative class, an imbalance treatment technique known as SMOTETomek is applied using the imbalanced-learn Python package implementation. SMOTETomek consist in first applying the over-sampling technique SMOTE, which generates synthetic data point focusing on the region near the class boundaries, and then cleaning the result using the under-sampling technique based on Tomek links, which focuses on selecting the closest pairs of data points belonging to different classes and eliminating the data point belonging to the majority class.</text:span></text:p>
      <text:p text:style-name="P62"><text:span text:style-name="T24">Note that this preprocessing step is applied only on the traning set.</text:span></text:p>
      <text:p text:style-name="P60"><text:span text:style-name="T24"/></text:p>
      <text:p text:style-name="P61"><text:span text:style-name="T24">Of course, care has been taken </text:span><text:span text:style-name="T28">in</text:span><text:span text:style-name="T24"> first generating the </text:span><text:span text:style-name="T28">values (e.g. </text:span><text:span text:style-name="T22">μ</text:span><text:span text:style-name="T29"> and </text:span><text:span text:style-name="T22">σ</text:span><text:span text:style-name="T28">) using only the training set and then applying the same transformation separately to both the training and the test set.</text:span></text:p>
      <text:p text:style-name="P49"><text:span text:style-name="T27"/></text:p>
      <text:p text:style-name="P49"><text:span text:style-name="T27"/></text:p>
      <text:p text:style-name="P34">Models</text:p>
      <text:p text:style-name="P62">Both the SVM model and the Logistic Regression model have been implemented using <text:span text:style-name="T52">P</text:span><text:span text:style-name="T55">egasos</text:span><text:span text:style-name="T52">,</text:span> the Stochastic Gradient Descent (SDG) algorithm presented in [2], <text:span text:style-name="T52">with the difference that I used a random draw </text:span><text:span text:style-name="T53">without</text:span><text:span text:style-name="T52"> replacement for selecting the random samples. </text:span><text:span text:style-name="T54">The random drawing procedure is subdivided into epochs: during each epoch an array containing the indices of the training samples is shuffled and then traversed sequentially. </text:span><text:span text:style-name="T52">I did this in order to implement a stopping criterium, which is </text:span><text:span text:style-name="T54">to stop the algorithm once a prefixed number of iterations </text:span><text:span text:style-name="T8">max_iter_no_changes</text:span><text:span text:style-name="T54"> has passed without seeing an improvement in the value of the objective function within a prefixed tolerance </text:span><text:span text:style-name="T8">tol</text:span><text:span text:style-name="T54">. This was inspired by the scikit-learn implementation of the SGD procedure.</text:span></text:p>
      <text:p text:style-name="P63"/>
      <text:p text:style-name="P63"/>
      <text:p text:style-name="P36">SVM</text:p>
      <text:p text:style-name="P19">We wish to learn a linear predictor h: X <text:span text:style-name="T30">−</text:span><text:span text:style-name="T35">&gt;</text:span> {-1, 1} such that h(x) = sgn(w<text:span text:style-name="T38">T</text:span><text:span text:style-name="T39">x + b), which given an input vector x will predict its label y. The idea at the </text:span><text:span text:style-name="T40">core </text:span><text:span text:style-name="T39">of SVMs is to pick the parameters w, b such that the geometric margin between the hyperplane w</text:span><text:span text:style-name="T38">T</text:span><text:span text:style-name="T39">x + b and the closest data points is maximized, while also minimizing the loss that we incur when a data point is misclassified. This objective can be expressed by the following objective function, which we want to minimize:</text:span></text:p>
      <text:p text:style-name="P53"/>
      <text:p text:style-name="P17"><text:s text:c="45"/><draw:frame draw:style-name="fr3" draw:name="Object3" text:anchor-type="as-char" svg:y="-0.2807in" svg:width="2.9764in" svg:height="0.4484in" draw:z-index="2"><draw:object xlink:href="./Object 3" xlink:type="simple" xlink:show="embed" xlink:actuate="onLoad"/><draw:image xlink:href="./ObjectReplacements/Object 3" xlink:type="simple" xlink:show="embed" xlink:actuate="onLoad"/></draw:frame><text:s text:c="35"/><text:span text:style-name="T55">(1)</text:span> <text:s text:c="5"/></text:p>
      <text:p text:style-name="P54"/>
      <text:p text:style-name="P15">where <text:span text:style-name="T23">λ</text:span><text:span text:style-name="T33"> is an hyperparameter controlling the strength of the regularization, </text:span><text:span text:style-name="T34">m</text:span><text:span text:style-name="T33"> is the size of the training set </text:span><text:span text:style-name="T36">and [</text:span><text:span text:style-name="T31">∙</text:span><text:span text:style-name="T36">]</text:span><text:span text:style-name="T51">+</text:span><text:span text:style-name="T42"> is a function that returns its argument if it is positive and zero otherwise.</text:span></text:p>
      <text:p text:style-name="P22"><text:span text:style-name="T42">T</text:span><text:span text:style-name="T41">he algorithm is a </text:span><text:span text:style-name="T43">SGD</text:span><text:span text:style-name="T41"> algorithm, so </text:span><text:span text:style-name="T43">after</text:span><text:span text:style-name="T41"> initializ</text:span><text:span text:style-name="T43">ing</text:span><text:span text:style-name="T41"> w = 0, b = 0, </text:span><text:span text:style-name="T47">for each update step </text:span><text:span text:style-name="T44">t</text:span><text:span text:style-name="T47"> it performs the following operation:</text:span></text:p>
      <text:p text:style-name="P57"><text:span text:style-name="T41"/></text:p>
      <text:list xml:id="list2047276578" text:style-name="L4">
        <text:list-item>
          <text:p text:style-name="P24"><text:span text:style-name="T41">draw a random sample </text:span><text:span text:style-name="T44">i</text:span></text:p>
        </text:list-item>
        <text:list-item>
          <text:p text:style-name="P28"><text:span text:style-name="T41">approximate the objective function (1) with</text:span><text:span text:style-name="T41"><draw:frame draw:style-name="fr2" draw:name="Object5" text:anchor-type="as-char" svg:y="-0.1937in" svg:width="2.722in" svg:height="0.3429in" draw:z-index="3"><draw:object xlink:href="./Object 5" xlink:type="simple" xlink:show="embed" xlink:actuate="onLoad"/><draw:image xlink:href="./ObjectReplacements/Object 5" xlink:type="simple" xlink:show="embed" xlink:actuate="onLoad"/><svg:desc>formula</svg:desc></draw:frame></text:span></text:p>
        </text:list-item>
        <text:list-item>
          <text:p text:style-name="P30"><text:soft-page-break/><text:span text:style-name="T41">compute the sub-gradient</text:span><text:span text:style-name="T41"><draw:frame draw:style-name="fr1" draw:name="Object6" text:anchor-type="as-char" svg:y="-0.172in" svg:width="2.3661in" svg:height="0.2327in" draw:z-index="4"><draw:object xlink:href="./Object 6" xlink:type="simple" xlink:show="embed" xlink:actuate="onLoad"/><draw:image xlink:href="./ObjectReplacements/Object 6" xlink:type="simple" xlink:show="embed" xlink:actuate="onLoad"/></draw:frame></text:span><text:span text:style-name="T41">, where </text:span><text:span text:style-name="T41"><draw:frame draw:style-name="fr1" draw:name="Object7" text:anchor-type="as-char" svg:y="-0.172in" svg:width="1.3291in" svg:height="0.2327in" draw:z-index="5"><draw:object xlink:href="./Object 7" xlink:type="simple" xlink:show="embed" xlink:actuate="onLoad"/><draw:image xlink:href="./ObjectReplacements/Object 7" xlink:type="simple" xlink:show="embed" xlink:actuate="onLoad"/><svg:desc>formula</svg:desc></draw:frame></text:span><text:span text:style-name="T41"><text:s/>is the indicator function </text:span></text:p>
        </text:list-item>
        <text:list-item>
          <text:p text:style-name="P26"><text:span text:style-name="T46">update</text:span><text:span text:style-name="T45"><draw:frame draw:style-name="fr1" draw:name="Object4" text:anchor-type="as-char" svg:y="-0.2437in" svg:width="1.3075in" svg:height="0.3929in" draw:z-index="6"><draw:object xlink:href="./Object 4" xlink:type="simple" xlink:show="embed" xlink:actuate="onLoad"/><draw:image xlink:href="./ObjectReplacements/Object 4" xlink:type="simple" xlink:show="embed" xlink:actuate="onLoad"/></draw:frame></text:span><text:span text:style-name="T41">(where the step size is carefully chosen in order to prove a convergence rate for the algorithm)</text:span></text:p>
        </text:list-item>
      </text:list>
      <text:p text:style-name="P2"/>
      <text:p text:style-name="P65">until the stopping criterium is satisfied.</text:p>
      <text:p text:style-name="P2"/>
      <text:p text:style-name="P2"/>
      <text:p text:style-name="P37">Logistic Regression</text:p>
      <text:p text:style-name="P21"><text:span text:style-name="T56">In this case w</text:span>e wish to learn a </text:p>
      <text:p text:style-name="P21"/>
      <text:p text:style-name="P21"/>
      <text:p text:style-name="P21"/>
      <text:p text:style-name="P21">linear predictor h: X <text:span text:style-name="T30">−</text:span><text:span text:style-name="T35">&gt;</text:span> {-1, 1}, <text:span text:style-name="T56">but such that</text:span> h(x) = <text:span text:style-name="T32">σ</text:span>(w<text:span text:style-name="T38">T</text:span><text:span text:style-name="T39">x + b),</text:span></text:p>
      <text:p text:style-name="P20"><text:span text:style-name="T49">where </text:span><text:span text:style-name="T50">σ is the logistic function </text:span><text:span text:style-name="T50"><draw:frame draw:style-name="fr1" draw:name="Object13" text:anchor-type="as-char" svg:y="-0.2437in" svg:width="0.9661in" svg:height="0.4165in" draw:z-index="12"><draw:object xlink:href="./Object 13" xlink:type="simple" xlink:show="embed" xlink:actuate="onLoad"/><draw:image xlink:href="./ObjectReplacements/Object 13" xlink:type="simple" xlink:show="embed" xlink:actuate="onLoad"/><svg:desc>formula</svg:desc></draw:frame></text:span><text:span text:style-name="T50"><text:s/></text:span><text:span text:style-name="T39"><text:s/>. The idea at the </text:span><text:span text:style-name="T40">core </text:span><text:span text:style-name="T39">of SVMs is to pick the parameters w, b such that the geometric margin between the hyperplane w</text:span><text:span text:style-name="T38">T</text:span><text:span text:style-name="T39">x + b and the closest data points is maximized, while also minimizing the loss that we incur when a data point is misclassified. This objective can be expressed by the following objective function, which we want to minimize:</text:span></text:p>
      <text:p text:style-name="P56"/>
      <text:p text:style-name="P18"><text:s text:c="45"/><draw:frame draw:style-name="fr3" draw:name="Object8" text:anchor-type="as-char" svg:y="-0.2807in" svg:width="2.9764in" svg:height="0.4484in" draw:z-index="7"><draw:object xlink:href="./Object 8" xlink:type="simple" xlink:show="embed" xlink:actuate="onLoad"/><draw:image xlink:href="./ObjectReplacements/Object 8" xlink:type="simple" xlink:show="embed" xlink:actuate="onLoad"/><svg:desc>formula</svg:desc></draw:frame><text:s text:c="35"/><text:span text:style-name="T55">(1)</text:span> <text:s text:c="5"/></text:p>
      <text:p text:style-name="P55"/>
      <text:p text:style-name="P16">where <text:span text:style-name="T23">λ</text:span><text:span text:style-name="T33"> is an hyperparameter controlling the strength of the regularization, </text:span><text:span text:style-name="T34">m</text:span><text:span text:style-name="T33"> is the size of the training set </text:span><text:span text:style-name="T36">and [</text:span><text:span text:style-name="T31">∙</text:span><text:span text:style-name="T36">]</text:span><text:span text:style-name="T51">+</text:span><text:span text:style-name="T42"> is a function that returns its argument if it is positive and zero otherwise.</text:span></text:p>
      <text:p text:style-name="P23"><text:span text:style-name="T42">T</text:span><text:span text:style-name="T41">he algorithm is a </text:span><text:span text:style-name="T43">SGD</text:span><text:span text:style-name="T41"> algorithm, so </text:span><text:span text:style-name="T43">after</text:span><text:span text:style-name="T41"> initializ</text:span><text:span text:style-name="T43">ing</text:span><text:span text:style-name="T41"> w = 0, b = 0, </text:span><text:span text:style-name="T47">for each update step </text:span><text:span text:style-name="T44">t</text:span><text:span text:style-name="T47"> it performs the following operation:</text:span></text:p>
      <text:p text:style-name="P58"><text:span text:style-name="T41"/></text:p>
      <text:list xml:id="list225809117413414" text:continue-numbering="true" text:style-name="L4">
        <text:list-item>
          <text:p text:style-name="P25"><text:span text:style-name="T41">draw a random sample </text:span><text:span text:style-name="T44">i</text:span></text:p>
        </text:list-item>
        <text:list-item>
          <text:p text:style-name="P29"><text:span text:style-name="T41">approximate the objective function (1) with</text:span><text:span text:style-name="T41"><draw:frame draw:style-name="fr2" draw:name="Object9" text:anchor-type="as-char" svg:y="-0.1937in" svg:width="2.722in" svg:height="0.3429in" draw:z-index="8"><draw:object xlink:href="./Object 9" xlink:type="simple" xlink:show="embed" xlink:actuate="onLoad"/><draw:image xlink:href="./ObjectReplacements/Object 9" xlink:type="simple" xlink:show="embed" xlink:actuate="onLoad"/><svg:desc>formula</svg:desc></draw:frame></text:span></text:p>
        </text:list-item>
        <text:list-item>
          <text:p text:style-name="P31"><text:span text:style-name="T41">compute the sub-gradient</text:span><text:span text:style-name="T41"><draw:frame draw:style-name="fr1" draw:name="Object10" text:anchor-type="as-char" svg:y="-0.172in" svg:width="2.3661in" svg:height="0.2327in" draw:z-index="9"><draw:object xlink:href="./Object 10" xlink:type="simple" xlink:show="embed" xlink:actuate="onLoad"/><draw:image xlink:href="./ObjectReplacements/Object 10" xlink:type="simple" xlink:show="embed" xlink:actuate="onLoad"/><svg:desc>formula</svg:desc></draw:frame></text:span><text:span text:style-name="T41">, where </text:span><text:span text:style-name="T41"><draw:frame draw:style-name="fr1" draw:name="Object11" text:anchor-type="as-char" svg:y="-0.172in" svg:width="1.3291in" svg:height="0.2327in" draw:z-index="10"><draw:object xlink:href="./Object 11" xlink:type="simple" xlink:show="embed" xlink:actuate="onLoad"/><draw:image xlink:href="./ObjectReplacements/Object 11" xlink:type="simple" xlink:show="embed" xlink:actuate="onLoad"/><svg:desc>formula</svg:desc></draw:frame></text:span><text:span text:style-name="T41"><text:s/>is the indicator function </text:span></text:p>
        </text:list-item>
        <text:list-item>
          <text:p text:style-name="P27"><text:span text:style-name="T46">update</text:span><text:span text:style-name="T45"><draw:frame draw:style-name="fr1" draw:name="Object12" text:anchor-type="as-char" svg:y="-0.2437in" svg:width="1.3075in" svg:height="0.3929in" draw:z-index="11"><draw:object xlink:href="./Object 12" xlink:type="simple" xlink:show="embed" xlink:actuate="onLoad"/><draw:image xlink:href="./ObjectReplacements/Object 12" xlink:type="simple" xlink:show="embed" xlink:actuate="onLoad"/><svg:desc>formula</svg:desc></draw:frame></text:span><text:span text:style-name="T41">(where the step size is carefully chosen in order to prove a convergence rate for the algorithm)</text:span></text:p>
        </text:list-item>
      </text:list>
      <text:p text:style-name="P5"/>
      <text:p text:style-name="P66">until the stopping criterium is satisfied.</text:p>
      <text:p text:style-name="P66"/>
      <text:p text:style-name="P66"/>
      <text:p text:style-name="P66"/>
      <text:p text:style-name="P34">Kernels</text:p>
      <text:p text:style-name="P2">kernels</text:p>
      <text:p text:style-name="P2"/>
      <text:p text:style-name="P2"/>
      <text:p text:style-name="P34">Hyperparameter Tuning</text:p>
      <text:p text:style-name="P2">hyperparameter tuning</text:p>
      <text:p text:style-name="P2"/>
      <text:p text:style-name="P2"/>
      <text:p text:style-name="P34"><text:soft-page-break/>Evaluation</text:p>
      <text:p text:style-name="P2">evaluation</text:p>
      <text:p text:style-name="P2"/>
      <text:p text:style-name="P2"/>
      <text:p text:style-name="P2"/>
      <text:p text:style-name="P2"/>
      <text:p text:style-name="P2"/>
      <text:p text:style-name="P35">Bibliography</text:p>
      <text:p text:style-name="P32"><text:span text:style-name="T5">[1] </text:span><text:span text:style-name="T10">Paulo Cortez, António Cerdeira, Fernando Almeida, Telmo Matos, José Reis, “Modeling wine preferences by data mining from physicochemical properties” </text:span><text:span text:style-name="T14">Decision Support System</text:span><text:span text:style-name="T10">s, </text:span><text:span text:style-name="T14">Volume 47, Issue 4</text:span><text:span text:style-name="T10">, </text:span><text:span text:style-name="T12">(</text:span><text:span text:style-name="T10">2009</text:span><text:span text:style-name="T12">) </text:span><text:span text:style-name="T10">Pages 547-553</text:span></text:p>
      <text:p text:style-name="P64"><text:span text:style-name="T11">[2] </text:span><text:span text:style-name="T9">Shalev-Shwartz, S., Singer, Y., Srebro, N. </text:span><text:span text:style-name="T13">et al., </text:span><text:span text:style-name="T9"><text:s/>“Pegasos: primal estimated sub-gradient solver for SVM”, </text:span><text:span text:style-name="T13">Math. Program.</text:span><text:span text:style-name="T9"> </text:span><text:span text:style-name="T15">127</text:span><text:span text:style-name="T9">, 3–30 (2011)</text:span><text:span text:style-name="T11"> </text:span></text:p>
      <text:p text:style-name="P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9T12:20:58.160990802</meta:creation-date>
    <dc:date>2026-05-29T22:58:08.490046385</dc:date>
    <meta:editing-duration>PT2H11M16S</meta:editing-duration>
    <meta:editing-cycles>4</meta:editing-cycles>
    <meta:generator>LibreOffice/7.3.7.2$Linux_X86_64 LibreOffice_project/30$Build-2</meta:generator>
    <meta:document-statistic meta:table-count="0" meta:image-count="0" meta:object-count="13" meta:page-count="5" meta:paragraph-count="73" meta:word-count="1678" meta:character-count="10416" meta:non-whitespace-character-count="8642"/>
  </office:meta>
</office:document-meta>
</file>

<file path=Object 1/content.xml><?xml version="1.0" encoding="utf-8"?>
<math xmlns="http://www.w3.org/1998/Math/MathML" display="block">
  <semantics>
    <mrow>
      <mi>x</mi>
      <mrow>
        <mspace width="1em"/>
        <mo stretchy="false">&lt;</mo>
        <mspace width="1em"/>
      </mrow>
      <mi>μ</mi>
      <mrow>
        <mspace width="1em"/>
        <mo stretchy="false">−</mo>
        <mspace width="1em"/>
      </mrow>
      <mn>3</mn>
      <mi>σ</mi>
      <mrow>
        <mspace width="2em"/>
        <mo stretchy="false">∨</mo>
        <mspace width="2em"/>
      </mrow>
      <mi>x</mi>
      <mrow>
        <mspace width="1em"/>
        <mo stretchy="false">&gt;</mo>
        <mspace width="1em"/>
      </mrow>
      <mi>μ</mi>
      <mrow>
        <mspace width="1em"/>
        <mo stretchy="false">−</mo>
        <mspace width="1em"/>
      </mrow>
      <mn>3</mn>
      <mi>σ</mi>
    </mrow>
    <annotation encoding="StarMath 5.0">x ``&lt; ``%mu ``- ``3%sigma ````or ````x ``&gt; ``%mu`` - ``3%sigma </annotation>
  </semantics>
</math>
</file>

<file path=Object 10/content.xml><?xml version="1.0" encoding="utf-8"?>
<math xmlns="http://www.w3.org/1998/Math/MathML" display="block">
  <semantics>
    <mrow>
      <mrow>
        <msub>
          <mo stretchy="false">∇</mo>
          <mi>w</mi>
        </msub>
        <mo stretchy="false">=</mo>
        <mi>λ</mi>
      </mrow>
      <mrow>
        <mi>w</mi>
        <mo stretchy="false">−</mo>
        <mi mathvariant="normal">Ι</mi>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sub>
        <mi>x</mi>
        <mi>i</mi>
      </msub>
    </mrow>
    <annotation encoding="StarMath 5.0">alignc nabla_{w} = %lambda w - %IOTA [y_{i} (w^{T}x_{i} + b) `&lt;` 1]y_{i}x_{i}</annotation>
  </semantics>
</math>
</file>

<file path=Object 11/content.xml><?xml version="1.0" encoding="utf-8"?>
<math xmlns="http://www.w3.org/1998/Math/MathML" display="block">
  <semantics>
    <mrow>
      <mi mathvariant="normal">Ι</mi>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row>
    <annotation encoding="StarMath 5.0">alignc %IOTA [y_{i} (w^{T}x_{i} + b) `&lt;` 1]</annotation>
  </semantics>
</math>
</file>

<file path=Object 12/content.xml><?xml version="1.0" encoding="utf-8"?>
<math xmlns="http://www.w3.org/1998/Math/MathML" display="block">
  <semantics>
    <mrow>
      <mi>w</mi>
      <mspace width="0.5em"/>
      <mo stretchy="false">←</mo>
      <mspace width="0.5em"/>
      <mi>w</mi>
      <mrow>
        <mspace width="2em"/>
        <mo stretchy="false">−</mo>
        <mspace width="2em"/>
      </mrow>
      <mfrac>
        <mn>1</mn>
        <mrow>
          <mi>λ</mi>
          <mi>t</mi>
        </mrow>
      </mfrac>
      <msub>
        <mo stretchy="false">∇</mo>
        <mi>w</mi>
      </msub>
    </mrow>
    <annotation encoding="StarMath 5.0">alignc w `&lt;-`w ~- ~frac {1} {%lambda t} nabla_{w}  </annotation>
  </semantics>
</math>
</file>

<file path=Object 13/content.xml><?xml version="1.0" encoding="utf-8"?>
<math xmlns="http://www.w3.org/1998/Math/MathML" display="block">
  <semantics>
    <mrow>
      <mi>σ</mi>
      <mrow>
        <mo fence="true" form="prefix" stretchy="false">(</mo>
        <mrow>
          <mi>z</mi>
        </mrow>
        <mo fence="true" form="postfix" stretchy="false">)</mo>
      </mrow>
      <mrow>
        <mspace width="0.5em"/>
        <mo stretchy="false">=</mo>
        <mspace width="0.5em"/>
      </mrow>
      <mfrac>
        <mn>1</mn>
        <mrow>
          <mn>1</mn>
          <mo stretchy="false">+</mo>
          <msup>
            <mi mathvariant="normal">e</mi>
            <mi>z</mi>
          </msup>
        </mrow>
      </mfrac>
    </mrow>
    <annotation encoding="StarMath 5.0">alignc %sigma(z)` = `frac {1} {1 + {func e}^{z} }</annotation>
  </semantics>
</math>
</file>

<file path=Object 2/content.xml><?xml version="1.0" encoding="utf-8"?>
<math xmlns="http://www.w3.org/1998/Math/MathML" display="block">
  <semantics>
    <mrow>
      <mi>z</mi>
      <mrow>
        <mspace width="0.5em"/>
        <mo stretchy="false">=</mo>
        <mspace width="0.5em"/>
      </mrow>
      <mfrac>
        <mrow>
          <mi>x</mi>
          <mrow>
            <mspace width="2em"/>
            <mo stretchy="false">−</mo>
            <mspace width="2em"/>
          </mrow>
          <mi>μ</mi>
        </mrow>
        <mrow>
          <mspace width="0.5em"/>
          <mi>σ</mi>
          <mspace width="0.5em"/>
        </mrow>
      </mfrac>
    </mrow>
    <annotation encoding="StarMath 5.0">z `= `frac {x~ - ~%mu} {`%sigma`} </annotation>
  </semantics>
</math>
</file>

<file path=Object 3/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F(w, b) `=` frac {%lambda} {2} ldline w rdline^{2} + frac {1} {m} sum from{i = 1} to{m} [1 - y_{i}(w^{T}x_{i} + b)]_{"+"}</annotation>
  </semantics>
</math>
</file>

<file path=Object 4/content.xml><?xml version="1.0" encoding="utf-8"?>
<math xmlns="http://www.w3.org/1998/Math/MathML" display="block">
  <semantics>
    <mrow>
      <mi>w</mi>
      <mspace width="0.5em"/>
      <mo stretchy="false">←</mo>
      <mspace width="0.5em"/>
      <mi>w</mi>
      <mrow>
        <mspace width="2em"/>
        <mo stretchy="false">−</mo>
        <mspace width="2em"/>
      </mrow>
      <mfrac>
        <mn>1</mn>
        <mrow>
          <mi>λ</mi>
          <mi>t</mi>
        </mrow>
      </mfrac>
      <msub>
        <mo stretchy="false">∇</mo>
        <mi>w</mi>
      </msub>
    </mrow>
    <annotation encoding="StarMath 5.0">alignc w `&lt;-`w ~- ~frac {1} {%lambda t} nabla_{w}  </annotation>
  </semantics>
</math>
</file>

<file path=Object 5/content.xml><?xml version="1.0" encoding="utf-8"?>
<math xmlns="http://www.w3.org/1998/Math/MathML" display="block">
  <semantics>
    <mrow>
      <mi>F</mi>
      <mrow>
        <mo fence="true" form="prefix" stretchy="false">(</mo>
        <mrow>
          <mrow>
            <mi>w</mi>
            <mi>,</mi>
            <mi>b</mi>
            <mi>;</mi>
            <mi>i</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alignc F(w, b; i) `=` frac {%lambda} {2} ldline w rdline^{2} + [1 - y_{i}(w^{T}x_{i} + b)]_{"+"}</annotation>
  </semantics>
</math>
</file>

<file path=Object 6/content.xml><?xml version="1.0" encoding="utf-8"?>
<math xmlns="http://www.w3.org/1998/Math/MathML" display="block">
  <semantics>
    <mrow>
      <mrow>
        <msub>
          <mo stretchy="false">∇</mo>
          <mi>w</mi>
        </msub>
        <mo stretchy="false">=</mo>
        <mi>λ</mi>
      </mrow>
      <mrow>
        <mi>w</mi>
        <mo stretchy="false">−</mo>
        <mi mathvariant="normal">Ι</mi>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sub>
        <mi>x</mi>
        <mi>i</mi>
      </msub>
    </mrow>
    <annotation encoding="StarMath 5.0">alignc nabla_{w} = %lambda w - %IOTA [y_{i} (w^{T}x_{i} + b) `&lt;` 1]y_{i}x_{i}</annotation>
  </semantics>
</math>
</file>

<file path=Object 7/content.xml><?xml version="1.0" encoding="utf-8"?>
<math xmlns="http://www.w3.org/1998/Math/MathML" display="block">
  <semantics>
    <mrow>
      <mi mathvariant="normal">Ι</mi>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row>
    <annotation encoding="StarMath 5.0">alignc %IOTA [y_{i} (w^{T}x_{i} + b) `&lt;` 1]</annotation>
  </semantics>
</math>
</file>

<file path=Object 8/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F(w, b) `=` frac {%lambda} {2} ldline w rdline^{2} + frac {1} {m} sum from{i = 1} to{m} [1 - y_{i}(w^{T}x_{i} + b)]_{"+"}</annotation>
  </semantics>
</math>
</file>

<file path=Object 9/content.xml><?xml version="1.0" encoding="utf-8"?>
<math xmlns="http://www.w3.org/1998/Math/MathML" display="block">
  <semantics>
    <mrow>
      <mi>F</mi>
      <mrow>
        <mo fence="true" form="prefix" stretchy="false">(</mo>
        <mrow>
          <mrow>
            <mi>w</mi>
            <mi>,</mi>
            <mi>b</mi>
            <mi>;</mi>
            <mi>i</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alignc F(w, b; i) `=` frac {%lambda} {2} ldline w rdline^{2} + [1 - y_{i}(w^{T}x_{i} + b)]_{"+"}</annotation>
  </semantics>
</math>
</file>